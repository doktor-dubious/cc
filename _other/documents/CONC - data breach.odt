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style:writing-mode="page"/>
    </style:style>
    <style:style style:name="Table2.6" style:family="table-row">
      <style:table-row-properties style:min-row-height="0.2257in"/>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2.566in" style:rel-column-width="3695*"/>
    </style:style>
    <style:style style:name="Table4.B" style:family="table-column">
      <style:table-column-properties style:column-width="0.7486in" style:rel-column-width="1078*"/>
    </style:style>
    <style:style style:name="Table4.C" style:family="table-column">
      <style:table-column-properties style:column-width="3.3785in" style:rel-column-width="4865*"/>
    </style:style>
    <style:style style:name="Table4.A1" style:family="table-cell">
      <style:table-cell-properties style:writing-mode="page"/>
    </style:style>
    <style:style style:name="Table5" style:family="table">
      <style:table-properties style:width="6.6931in" table:align="margins"/>
    </style:style>
    <style:style style:name="Table5.A" style:family="table-column">
      <style:table-column-properties style:column-width="2.7465in" style:rel-column-width="3955*"/>
    </style:style>
    <style:style style:name="Table5.B" style:family="table-column">
      <style:table-column-properties style:column-width="1.7153in" style:rel-column-width="2470*"/>
    </style:style>
    <style:style style:name="Table5.C" style:family="table-column">
      <style:table-column-properties style:column-width="2.2313in" style:rel-column-width="3213*"/>
    </style:style>
    <style:style style:name="Table5.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style:writing-mode="pag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6c14c" style:font-weight-asian="bold" style:font-weight-complex="bold"/>
    </style:style>
    <style:style style:name="P3" style:family="paragraph" style:parent-style-name="Standard">
      <style:text-properties officeooo:paragraph-rsid="0006c14c"/>
    </style:style>
    <style:style style:name="P4" style:family="paragraph" style:parent-style-name="Standard">
      <style:paragraph-properties style:writing-mode="lr-tb"/>
      <style:text-properties officeooo:paragraph-rsid="0006c14c"/>
    </style:style>
    <style:style style:name="P5" style:family="paragraph" style:parent-style-name="Table_20_Contents">
      <style:text-properties officeooo:rsid="0006c14c" officeooo:paragraph-rsid="0006c14c"/>
    </style:style>
    <style:style style:name="P6" style:family="paragraph" style:parent-style-name="Table_20_Contents">
      <style:paragraph-properties style:writing-mode="lr-tb"/>
    </style:style>
    <style:style style:name="P7" style:family="paragraph" style:parent-style-name="Table_20_Contents">
      <style:text-properties officeooo:paragraph-rsid="0006c14c"/>
    </style:style>
    <style:style style:name="P8" style:family="paragraph" style:parent-style-name="Standard">
      <style:text-properties officeooo:paragraph-rsid="000753af"/>
    </style:style>
    <style:style style:name="P9" style:family="paragraph" style:parent-style-name="Standard">
      <style:text-properties fo:font-weight="bold" officeooo:paragraph-rsid="000753af" style:font-weight-asian="bold" style:font-weight-complex="bold"/>
    </style:style>
    <style:style style:name="T1" style:family="text">
      <style:text-properties fo:font-weight="bold" style:font-weight-asian="bold" style:font-weight-complex="bold"/>
    </style:style>
    <style:style style:name="T2" style:family="text">
      <style:text-properties officeooo:rsid="0006c1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LTRATHINK. <text:s text:c="216"/></text:p>
      <text:p text:style-name="Standard">In line with the other calculations on the CONC page: <text:s text:c="176"/></text:p>
      <text:p text:style-name="Standard">can you suggest a realistic calculation of the likelyhood of a data breach of small and mid-sized companies. <text:s text:c="121"/></text:p>
      <text:p text:style-name="Standard">Using whatever existing data is availale on the company, and the contrals and safeguards. <text:s text:c="140"/></text:p>
      <text:p text:style-name="Standard">Suggest additional information parameters if it would improve the calculation. <text:s text:c="151"/></text:p>
      <text:p text:style-name="Standard">What scientific papers, business standards are you basing the calculation on?</text:p>
      <text:p text:style-name="Standard"/>
      <text:p text:style-name="Standard">--</text:p>
      <text:p text:style-name="Standard"/>
      <text:p text:style-name="P1">Proposed: Annual Breach Probability Calculator</text:p>
      <text:p text:style-name="Standard"/>
      <text:p text:style-name="P2">Approach: Logistic base-rate model with multiplicative odds-adjustments</text:p>
      <text:p text:style-name="P2"/>
      <text:p text:style-name="P3">Use a <text:span text:style-name="T1">logistic (log-odds) model</text:span> rather than simple multiplication — this keeps the output naturally in [0%, 100%] and is the standard actuarial approach. The formula:</text:p>
      <text:p text:style-name="P3"/>
      <text:p text:style-name="P4">logit(P) = logit(P_base) + Σ(βᵢ × factorᵢ)</text:p>
      <text:p text:style-name="P4">P_annual = sigmoid(logit(P))</text:p>
      <text:p text:style-name="P3"/>
      <text:p text:style-name="P2">Inputs already available in the organization profile</text:p>
      <text:p text:style-name="P2"/>
      <table:table table:name="Table1" table:style-name="Table1">
        <table:table-column table:style-name="Table1.A" table:number-columns-repeated="3"/>
        <table:table-row>
          <table:table-cell table:style-name="Table1.A1" office:value-type="string">
            <text:p text:style-name="Table_20_Contents">Factor</text:p>
          </table:table-cell>
          <table:table-cell table:style-name="Table1.A1" office:value-type="string">
            <text:p text:style-name="P5">Source</text:p>
          </table:table-cell>
          <table:table-cell table:style-name="Table1.A1" office:value-type="string">
            <text:p text:style-name="Table_20_Contents">Role in model</text:p>
          </table:table-cell>
        </table:table-row>
        <table:table-row>
          <table:table-cell table:style-name="Table1.A1" office:value-type="string">
            <text:p text:style-name="Table_20_Contents">Org size</text:p>
          </table:table-cell>
          <table:table-cell table:style-name="Table1.A1" office:value-type="string">
            <text:p text:style-name="Table_20_Contents">orgSize</text:p>
          </table:table-cell>
          <table:table-cell table:style-name="Table1.A1" office:value-type="string">
            <text:p text:style-name="Table_20_Contents">Base rate selection</text:p>
          </table:table-cell>
        </table:table-row>
        <table:table-row>
          <table:table-cell table:style-name="Table1.A1" office:value-type="string">
            <text:p text:style-name="Table_20_Contents">Industry</text:p>
          </table:table-cell>
          <table:table-cell table:style-name="Table1.A1" office:value-type="string">
            <text:p text:style-name="Table_20_Contents">naceSection → IBM sector</text:p>
          </table:table-cell>
          <table:table-cell table:style-name="Table1.A1" office:value-type="string">
            <text:p text:style-name="Table_20_Contents">Industry risk modifier</text:p>
          </table:table-cell>
        </table:table-row>
        <table:table-row>
          <table:table-cell table:style-name="Table1.A1" office:value-type="string">
            <text:p text:style-name="Table_20_Contents">CMMI scores (all safeguards<text:span text:style-name="T2">)</text:span></text:p>
          </table:table-cell>
          <table:table-cell table:style-name="Table1.A1" office:value-type="string">
            <text:p text:style-name="Table_20_Contents">GAP report</text:p>
          </table:table-cell>
          <table:table-cell table:style-name="Table1.A1" office:value-type="string">
            <text:p text:style-name="Table_20_Contents">Primary maturity modifier — decomposed into Preventive, Detective, and Recovery sub-scores</text:p>
          </table:table-cell>
        </table:table-row>
        <table:table-row>
          <table:table-cell table:style-name="Table1.A1" office:value-type="string">
            <text:p text:style-name="Table_20_Contents">Data sensitivity</text:p>
          </table:table-cell>
          <table:table-cell table:style-name="Table1.A1" office:value-type="string">
            <text:p text:style-name="Table_20_Contents">dataSensitivity[]</text:p>
          </table:table-cell>
          <table:table-cell table:style-name="Table1.A1" office:value-type="string">
            <text:p text:style-name="Table_20_Contents">Target attractiveness</text:p>
          </table:table-cell>
        </table:table-row>
        <table:table-row>
          <table:table-cell table:style-name="Table1.A1" office:value-type="string">
            <text:p text:style-name="Table_20_Contents">Infrastructure types</text:p>
          </table:table-cell>
          <table:table-cell table:style-name="Table1.A1" office:value-type="string">
            <text:p text:style-name="Table_20_Contents">infrastructureTypes[]</text:p>
          </table:table-cell>
          <table:table-cell table:style-name="Table1.A1" office:value-type="string">
            <text:p text:style-name="Table_20_Contents">Attack surface complexity</text:p>
          </table:table-cell>
        </table:table-row>
        <table:table-row>
          <table:table-cell table:style-name="Table1.A1" office:value-type="string">
            <text:p text:style-name="Table_20_Contents">Geographic scope</text:p>
          </table:table-cell>
          <table:table-cell table:style-name="Table1.A1" office:value-type="string">
            <text:p text:style-name="Table_20_Contents">geographicScope</text:p>
          </table:table-cell>
          <table:table-cell table:style-name="Table1.A1" office:value-type="string">
            <text:p text:style-name="Table_20_Contents">Exposure surface</text:p>
          </table:table-cell>
        </table:table-row>
        <table:table-row>
          <table:table-cell table:style-name="Table1.A1" office:value-type="string">
            <text:p text:style-name="Table_20_Contents">IT dependency</text:p>
          </table:table-cell>
          <table:table-cell table:style-name="Table1.A1" office:value-type="string">
            <text:p text:style-name="Table_20_Contents">derived from manual op + prod dep + cust access</text:p>
          </table:table-cell>
          <table:table-cell table:style-name="Table1.A1" office:value-type="string">
            <text:p text:style-name="Table_20_Contents">Proxy for digital attack surface</text:p>
          </table:table-cell>
        </table:table-row>
        <table:table-row>
          <table:table-cell table:style-name="Table1.A1" office:value-type="string">
            <text:p text:style-name="Table_20_Contents">Regulatory obligations</text:p>
          </table:table-cell>
          <table:table-cell table:style-name="Table1.A1" office:value-type="string">
            <text:p text:style-name="Table_20_Contents">regulatoryObligations[]</text:p>
          </table:table-cell>
          <table:table-cell table:style-name="Table1.A1" office:value-type="string">
            <text:p text:style-name="Table_20_Contents">Detection/reporting bias adjustment</text:p>
          </table:table-cell>
        </table:table-row>
      </table:table>
      <text:p text:style-name="Standard"/>
      <text:p text:style-name="P2">Step 1: Base annual probability by organization size</text:p>
      <text:p text:style-name="P2"/>
      <text:p text:style-name="P3">Calibrated from Cyentia Institute IRIS (2020–2024), Hiscox Cyber Readiness Report (2023–2024), and Ponemon/IBM longitudinal data:</text:p>
      <text:p text:style-name="P3"/>
      <table:table table:name="Table2" table:style-name="Table2">
        <table:table-column table:style-name="Table2.A" table:number-columns-repeated="4"/>
        <table:table-row>
          <table:table-cell table:style-name="Table2.A1" office:value-type="string">
            <text:p text:style-name="Table_20_Contents">Size</text:p>
          </table:table-cell>
          <table:table-cell table:style-name="Table2.A1" office:value-type="string">
            <text:p text:style-name="Table_20_Contents">Employees</text:p>
          </table:table-cell>
          <table:table-cell table:style-name="Table2.A1" office:value-type="string">
            <text:p text:style-name="Table_20_Contents">Base P(breach/year)</text:p>
          </table:table-cell>
          <table:table-cell table:style-name="Table2.A1" office:value-type="string">
            <text:p text:style-name="Table_20_Contents">Source calibration</text:p>
          </table:table-cell>
        </table:table-row>
        <table:table-row>
          <table:table-cell table:style-name="Table2.A1" office:value-type="string">
            <text:p text:style-name="Table_20_Contents">MICRO</text:p>
          </table:table-cell>
          <table:table-cell table:style-name="Table2.A1" office:value-type="string">
            <text:p text:style-name="Table_20_Contents">0–9</text:p>
          </table:table-cell>
          <table:table-cell table:style-name="Table2.A1" office:value-type="string">
            <text:p text:style-name="Table_20_Contents">6%</text:p>
          </table:table-cell>
          <table:table-cell table:style-name="Table2.A1" office:value-type="string">
            <text:p text:style-name="Table_20_Contents">Hiscox 2024: ~5% for &lt;10 FTE</text:p>
          </table:table-cell>
        </table:table-row>
        <table:table-row>
          <table:table-cell table:style-name="Table2.A1" office:value-type="string">
            <text:p text:style-name="Table_20_Contents">SMALL</text:p>
          </table:table-cell>
          <table:table-cell table:style-name="Table2.A1" office:value-type="string">
            <text:p text:style-name="Table_20_Contents">10–49</text:p>
          </table:table-cell>
          <table:table-cell table:style-name="Table2.A1" office:value-type="string">
            <text:p text:style-name="Table_20_Contents"><text:span text:style-name="T2">10</text:span>%</text:p>
          </table:table-cell>
          <table:table-cell table:style-name="Table2.A1" office:value-type="string">
            <text:p text:style-name="Table_20_Contents">Hiscox 2024: ~12% for 10–49</text:p>
          </table:table-cell>
        </table:table-row>
        <table:table-row>
          <table:table-cell table:style-name="Table2.A1" office:value-type="string">
            <text:p text:style-name="Table_20_Contents">MEDIUM</text:p>
          </table:table-cell>
          <table:table-cell table:style-name="Table2.A1" office:value-type="string">
            <text:p text:style-name="Table_20_Contents">50–249</text:p>
          </table:table-cell>
          <table:table-cell table:style-name="Table2.A1" office:value-type="string">
            <text:p text:style-name="Table_20_Contents"><text:span text:style-name="T2">18</text:span>%</text:p>
          </table:table-cell>
          <table:table-cell table:style-name="Table2.A1" office:value-type="string">
            <text:p text:style-name="Table_20_Contents">IBM/Ponemon: ~15–20% for mid-market</text:p>
          </table:table-cell>
        </table:table-row>
        <table:table-row>
          <table:table-cell table:style-name="Table2.A1" office:value-type="string">
            <text:p text:style-name="Table_20_Contents">LARGE</text:p>
          </table:table-cell>
          <table:table-cell table:style-name="Table2.A1" office:value-type="string">
            <text:p text:style-name="Table_20_Contents">250–999</text:p>
          </table:table-cell>
          <table:table-cell table:style-name="Table2.A1" office:value-type="string">
            <text:p text:style-name="P5">25%</text:p>
          </table:table-cell>
          <table:table-cell table:style-name="Table2.A1" office:value-type="string">
            <text:p text:style-name="Table_20_Contents">Cyentia IRIS: scales log-linearly</text:p>
          </table:table-cell>
        </table:table-row>
        <table:table-row table:style-name="Table2.6">
          <table:table-cell table:style-name="Table2.A1" office:value-type="string">
            <text:p text:style-name="Table_20_Contents">ENTERPRISE</text:p>
          </table:table-cell>
          <table:table-cell table:style-name="Table2.A1" office:value-type="string">
            <text:p text:style-name="Table_20_Contents">1000+</text:p>
          </table:table-cell>
          <table:table-cell table:style-name="Table2.A1" office:value-type="string">
            <text:p text:style-name="P5">33%</text:p>
          </table:table-cell>
          <table:table-cell table:style-name="Table2.A1" office:value-type="string">
            <text:p text:style-name="Table_20_Contents">IBM: ~27% over 24 <text:soft-page-break/>months → ~15%/yr, but large orgs have higher detection</text:p>
          </table:table-cell>
        </table:table-row>
      </table:table>
      <text:p text:style-name="Standard"/>
      <text:p text:style-name="Standard"/>
      <text:p text:style-name="P3">These are material breach probabilities (significant operational/data impact), not all security incidents.</text:p>
      <text:p text:style-name="P3"/>
      <text:p text:style-name="P2">Step 2: Industry modifier (log-odds adjustment)</text:p>
      <text:p text:style-name="P3"/>
      <text:p text:style-name="P3">Derived from Verizon DBIR 2024 industry-specific breach frequency and IBM sector cost differentials:</text:p>
      <text:p text:style-name="P3"/>
      <table:table table:name="Table3" table:style-name="Table3">
        <table:table-column table:style-name="Table3.A" table:number-columns-repeated="3"/>
        <table:table-row>
          <table:table-cell table:style-name="Table3.A1" office:value-type="string">
            <text:p text:style-name="Table_20_Contents">Sector</text:p>
          </table:table-cell>
          <table:table-cell table:style-name="Table3.A1" office:value-type="string">
            <text:p text:style-name="Table_20_Contents">β_industry</text:p>
          </table:table-cell>
          <table:table-cell table:style-name="Table3.A1" office:value-type="string">
            <text:p text:style-name="Table_20_Contents">Rationale</text:p>
          </table:table-cell>
        </table:table-row>
        <table:table-row>
          <table:table-cell table:style-name="Table3.A1" office:value-type="string">
            <text:p text:style-name="Table_20_Contents">Healthcare</text:p>
          </table:table-cell>
          <table:table-cell table:style-name="Table3.A1" office:value-type="string">
            <text:p text:style-name="Table_20_Contents">+0.40</text:p>
          </table:table-cell>
          <table:table-cell table:style-name="Table3.A1" office:value-type="string">
            <text:p text:style-name="Table_20_Contents">Highest targeted (DBIR), high-value data</text:p>
          </table:table-cell>
        </table:table-row>
        <table:table-row>
          <table:table-cell table:style-name="Table3.A1" office:value-type="string">
            <text:p text:style-name="Table_20_Contents">Financial</text:p>
          </table:table-cell>
          <table:table-cell table:style-name="Table3.A1" office:value-type="string">
            <text:p text:style-name="Table_20_Contents">+0.<text:span text:style-name="T2">3</text:span>0</text:p>
          </table:table-cell>
          <table:table-cell table:style-name="Table3.A1" office:value-type="string">
            <text:p text:style-name="Table_20_Contents">High-value target, regulated = more detection</text:p>
          </table:table-cell>
        </table:table-row>
        <table:table-row>
          <table:table-cell table:style-name="Table3.A1" office:value-type="string">
            <text:p text:style-name="Table_20_Contents">Technology</text:p>
          </table:table-cell>
          <table:table-cell table:style-name="Table3.A1" office:value-type="string">
            <text:p text:style-name="Table_20_Contents">+0.<text:span text:style-name="T2">2</text:span>0</text:p>
          </table:table-cell>
          <table:table-cell table:style-name="Table3.A1" office:value-type="string">
            <text:p text:style-name="Table_20_Contents">Large attack surface, IP-rich</text:p>
          </table:table-cell>
        </table:table-row>
        <table:table-row>
          <table:table-cell table:style-name="Table3.A1" office:value-type="string">
            <text:p text:style-name="Table_20_Contents">Energy</text:p>
          </table:table-cell>
          <table:table-cell table:style-name="Table3.A1" office:value-type="string">
            <text:p text:style-name="Table_20_Contents">+0.<text:span text:style-name="T2">15</text:span></text:p>
          </table:table-cell>
          <table:table-cell table:style-name="Table3.A1" office:value-type="string">
            <text:p text:style-name="Table_20_Contents">OT exposure, nation-state interest</text:p>
          </table:table-cell>
        </table:table-row>
        <table:table-row>
          <table:table-cell table:style-name="Table3.A1" office:value-type="string">
            <text:p text:style-name="Table_20_Contents">Education</text:p>
          </table:table-cell>
          <table:table-cell table:style-name="Table3.A1" office:value-type="string">
            <text:p text:style-name="Table_20_Contents">+0.<text:span text:style-name="T2">10</text:span></text:p>
          </table:table-cell>
          <table:table-cell table:style-name="Table3.A1" office:value-type="string">
            <text:p text:style-name="Table_20_Contents">Under-resourced, large user bases</text:p>
          </table:table-cell>
        </table:table-row>
        <table:table-row>
          <table:table-cell table:style-name="Table3.A1" office:value-type="string">
            <text:p text:style-name="Table_20_Contents">Retail</text:p>
          </table:table-cell>
          <table:table-cell table:style-name="Table3.A1" office:value-type="string">
            <text:p text:style-name="Table_20_Contents">+0.<text:span text:style-name="T2">05</text:span></text:p>
          </table:table-cell>
          <table:table-cell table:style-name="Table3.A1" office:value-type="string">
            <text:p text:style-name="Table_20_Contents">Payment card data, but better PCI controls</text:p>
          </table:table-cell>
        </table:table-row>
        <table:table-row>
          <table:table-cell table:style-name="Table3.A1" office:value-type="string">
            <text:p text:style-name="Table_20_Contents">Services</text:p>
          </table:table-cell>
          <table:table-cell table:style-name="Table3.A1" office:value-type="string">
            <text:p text:style-name="Table_20_Contents">+0.<text:span text:style-name="T2">00</text:span></text:p>
          </table:table-cell>
          <table:table-cell table:style-name="Table3.A1" office:value-type="string">
            <text:p text:style-name="Table_20_Contents">Baseline</text:p>
          </table:table-cell>
        </table:table-row>
        <table:table-row>
          <table:table-cell table:style-name="Table3.A1" office:value-type="string">
            <text:p text:style-name="Table_20_Contents">Industrial/Manufacturing</text:p>
          </table:table-cell>
          <table:table-cell table:style-name="Table3.A1" office:value-type="string">
            <text:p text:style-name="Table_20_Contents">-0.05</text:p>
          </table:table-cell>
          <table:table-cell table:style-name="Table3.A1" office:value-type="string">
            <text:p text:style-name="Table_20_Contents">Less data-rich, but OT risk emerging</text:p>
          </table:table-cell>
        </table:table-row>
        <table:table-row>
          <table:table-cell table:style-name="Table3.A1" office:value-type="string">
            <text:p text:style-name="Table_20_Contents">Public</text:p>
          </table:table-cell>
          <table:table-cell table:style-name="Table3.A1" office:value-type="string">
            <text:p text:style-name="Table_20_Contents">-0.10</text:p>
          </table:table-cell>
          <table:table-cell table:style-name="Table3.A1" office:value-type="string">
            <text:p text:style-name="Table_20_Contents">Lower target value for financial criminals</text:p>
          </table:table-cell>
        </table:table-row>
      </table:table>
      <text:p text:style-name="Standard"/>
      <text:p text:style-name="P2">Step 3: CIS Controls maturity modifier (largest effect)</text:p>
      <text:p text:style-name="P3"/>
      <text:p text:style-name="P3">This is the most impactful and actionable factor. Decompose into three control sub-groups using the full GAP assessment:</text:p>
      <text:p text:style-name="Standard"/>
      <text:p text:style-name="P3"><text:span text:style-name="T1">Preventive Controls</text:span> (weighted 45% of maturity effect):</text:p>
      <text:p text:style-name="P3">- CIS 4: Secure Configuration</text:p>
      <text:p text:style-name="P3">- CIS 5: Account Management</text:p>
      <text:p text:style-name="P3">- CIS 6: Access Control Management</text:p>
      <text:p text:style-name="P3">- CIS 7: Continuous Vulnerability Management</text:p>
      <text:p text:style-name="P3">- CIS 10: Malware Defenses</text:p>
      <text:p text:style-name="P3">- CIS 12: Network Infrastructure Management</text:p>
      <text:p text:style-name="P3">- CIS 14: Security Awareness Training</text:p>
      <text:p text:style-name="P3"/>
      <text:p text:style-name="P3"><text:span text:style-name="T1">Detective Controls</text:span> (weighted 35%):</text:p>
      <text:p text:style-name="P3">- CIS 8: Audit Log Management (8.1–8.12)</text:p>
      <text:p text:style-name="P3">- CIS 9: Email and Web Browser Protections</text:p>
      <text:p text:style-name="P3">- CIS 13: Network Monitoring and Defense</text:p>
      <text:p text:style-name="P3"/>
      <text:p text:style-name="P3">Data Protection Controls (weighted 20%):</text:p>
      <text:p text:style-name="P3">- CIS 3: Data Protection</text:p>
      <text:p text:style-name="P3"><text:soft-page-break/>- CIS 11: Data Recovery (overlaps with existing CONC restore)</text:p>
      <text:p text:style-name="P3">- CIS 15: Service Provider Management</text:p>
      <text:p text:style-name="P3">- CIS 16: Application Software Security</text:p>
      <text:p text:style-name="P3"/>
      <text:p text:style-name="P3">For each sub-group, compute average CMMI (1–5), then:</text:p>
      <text:p text:style-name="P3"/>
      <text:p text:style-name="P3">β_maturity = -0.8 × ((weighted_avg_cmmi - 1) / 4)</text:p>
      <text:p text:style-name="P3"/>
      <text:p text:style-name="P3">Range: <text:span text:style-name="T1">0.0 (CMMI 1) to -0.8 (CMMI 5</text:span>)</text:p>
      <text:p text:style-name="P3"/>
      <text:p text:style-name="P3">This means a fully mature organization reduces its breach odds by ~55% vs. an immature one. Calibrated from:</text:p>
      <text:p text:style-name="P3"/>
      <text:p text:style-name="P3">- IBM 2024: organizations with security AI/automation (CMMI 4–5 equivalent) had 108 fewer days to identify breaches and $2.22M lower costs</text:p>
      <text:p text:style-name="P3">- Cyentia IRIS: organizations in top quintile of security maturity had ~45% fewer breaches</text:p>
      <text:p text:style-name="P3">- SANS 2023: CIS Controls adoption correlates with ~40–60% reduction in successful attacks</text:p>
      <text:p text:style-name="P3"/>
      <text:p text:style-name="P2">Step 4: Data attractiveness modifier</text:p>
      <text:p text:style-name="P2"/>
      <text:p text:style-name="P3">Higher-value data attracts more sophisticated and persistent attackers:</text:p>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Table_20_Contents">Data type</text:p>
          </table:table-cell>
          <table:table-cell table:style-name="Table4.A1" office:value-type="string">
            <text:p text:style-name="Table_20_Contents">β_data</text:p>
          </table:table-cell>
          <table:table-cell table:style-name="Table4.A1" office:value-type="string">
            <text:p text:style-name="Table_20_Contents">Rationale</text:p>
          </table:table-cell>
        </table:table-row>
        <table:table-row>
          <table:table-cell table:style-name="Table4.A1" office:value-type="string">
            <text:p text:style-name="Table_20_Contents">BASIC_BUSINESS</text:p>
          </table:table-cell>
          <table:table-cell table:style-name="Table4.A1" office:value-type="string">
            <text:p text:style-name="Table_20_Contents">-0.15</text:p>
          </table:table-cell>
          <table:table-cell table:style-name="Table4.A1" office:value-type="string">
            <text:p text:style-name="Table_20_Contents">Low attacker motivation</text:p>
          </table:table-cell>
        </table:table-row>
        <table:table-row>
          <table:table-cell table:style-name="Table4.A1" office:value-type="string">
            <text:p text:style-name="P6">INTELLECTUAL_PROPERTY</text:p>
          </table:table-cell>
          <table:table-cell table:style-name="Table4.A1" office:value-type="string">
            <text:p text:style-name="Table_20_Contents">0.00</text:p>
          </table:table-cell>
          <table:table-cell table:style-name="Table4.A1" office:value-type="string">
            <text:p text:style-name="Table_20_Contents">Baseline — targeted but niche</text:p>
          </table:table-cell>
        </table:table-row>
        <table:table-row>
          <table:table-cell table:style-name="Table4.A1" office:value-type="string">
            <text:p text:style-name="Table_20_Contents">CRITICAL_INFRASTRUCTURE</text:p>
          </table:table-cell>
          <table:table-cell table:style-name="Table4.A1" office:value-type="string">
            <text:p text:style-name="Table_20_Contents">+0.10</text:p>
          </table:table-cell>
          <table:table-cell table:style-name="Table4.A1" office:value-type="string">
            <text:p text:style-name="Table_20_Contents">Nation-state interest</text:p>
          </table:table-cell>
        </table:table-row>
        <table:table-row>
          <table:table-cell table:style-name="Table4.A1" office:value-type="string">
            <text:p text:style-name="Table_20_Contents">CUSTOMER_PII</text:p>
          </table:table-cell>
          <table:table-cell table:style-name="Table4.A1" office:value-type="string">
            <text:p text:style-name="Table_20_Contents">+0.10</text:p>
          </table:table-cell>
          <table:table-cell table:style-name="Table4.A1" office:value-type="string">
            <text:p text:style-name="Table_20_Contents">Mass monetizable</text:p>
          </table:table-cell>
        </table:table-row>
        <table:table-row>
          <table:table-cell table:style-name="Table4.A1" office:value-type="string">
            <text:p text:style-name="Table_20_Contents">PAYMENT_CARD</text:p>
          </table:table-cell>
          <table:table-cell table:style-name="Table4.A1" office:value-type="string">
            <text:p text:style-name="Table_20_Contents">+0.20</text:p>
          </table:table-cell>
          <table:table-cell table:style-name="Table4.A1" office:value-type="string">
            <text:p text:style-name="Table_20_Contents">Directly monetizable, proven attack chains</text:p>
          </table:table-cell>
        </table:table-row>
        <table:table-row>
          <table:table-cell table:style-name="Table4.A1" office:value-type="string">
            <text:p text:style-name="Table_20_Contents">SPECIAL_CATEGORY</text:p>
          </table:table-cell>
          <table:table-cell table:style-name="Table4.A1" office:value-type="string">
            <text:p text:style-name="Table_20_Contents">+0.15</text:p>
          </table:table-cell>
          <table:table-cell table:style-name="Table4.A1" office:value-type="string">
            <text:p text:style-name="Table_20_Contents">High extortion value</text:p>
          </table:table-cell>
        </table:table-row>
        <table:table-row>
          <table:table-cell table:style-name="Table4.A1" office:value-type="string">
            <text:p text:style-name="Table_20_Contents">CLASSIFIED_GOVERNMENT</text:p>
          </table:table-cell>
          <table:table-cell table:style-name="Table4.A1" office:value-type="string">
            <text:p text:style-name="Table_20_Contents">+0.25</text:p>
          </table:table-cell>
          <table:table-cell table:style-name="Table4.A1" office:value-type="string">
            <text:p text:style-name="Table_20_Contents">Nation-state targeting</text:p>
          </table:table-cell>
        </table:table-row>
      </table:table>
      <text:p text:style-name="P2"/>
      <text:p text:style-name="P3">Use max across all data types (same pattern as existing CONC).</text:p>
      <text:p text:style-name="P3"/>
      <text:p text:style-name="P2">Step 5: Infrastructure exposure modifier</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7">Infrastructure</text:p>
          </table:table-cell>
          <table:table-cell table:style-name="Table5.A1" office:value-type="string">
            <text:p text:style-name="P7">β_infra</text:p>
          </table:table-cell>
          <table:table-cell table:style-name="Table5.A1" office:value-type="string">
            <text:p text:style-name="P7">Rationale</text:p>
          </table:table-cell>
        </table:table-row>
        <table:table-row>
          <table:table-cell table:style-name="Table5.A1" office:value-type="string">
            <text:p text:style-name="P7">CLOUD_ONLY</text:p>
          </table:table-cell>
          <table:table-cell table:style-name="Table5.A1" office:value-type="string">
            <text:p text:style-name="P7">-0.10</text:p>
          </table:table-cell>
          <table:table-cell table:style-name="Table5.A1" office:value-type="string">
            <text:p text:style-name="P7">Smaller perimeter, provider-managed patching</text:p>
          </table:table-cell>
        </table:table-row>
        <table:table-row>
          <table:table-cell table:style-name="Table5.A1" office:value-type="string">
            <text:p text:style-name="P7">MULTI_CLOUD</text:p>
          </table:table-cell>
          <table:table-cell table:style-name="Table5.A1" office:value-type="string">
            <text:p text:style-name="P7">0.00</text:p>
          </table:table-cell>
          <table:table-cell table:style-name="Table5.A1" office:value-type="string">
            <text:p text:style-name="P7">Baseline — wider but managed</text:p>
          </table:table-cell>
        </table:table-row>
        <table:table-row>
          <table:table-cell table:style-name="Table5.A1" office:value-type="string">
            <text:p text:style-name="P7">HYBRID</text:p>
          </table:table-cell>
          <table:table-cell table:style-name="Table5.A1" office:value-type="string">
            <text:p text:style-name="P7">+0.05</text:p>
          </table:table-cell>
          <table:table-cell table:style-name="Table5.A1" office:value-type="string">
            <text:p text:style-name="P7">Integration seams create exposure</text:p>
          </table:table-cell>
        </table:table-row>
        <table:table-row>
          <table:table-cell table:style-name="Table5.A1" office:value-type="string">
            <text:p text:style-name="P7">ON_PREMISES</text:p>
          </table:table-cell>
          <table:table-cell table:style-name="Table5.A1" office:value-type="string">
            <text:p text:style-name="P7">+0.10</text:p>
          </table:table-cell>
          <table:table-cell table:style-name="Table5.A1" office:value-type="string">
            <text:p text:style-name="P7">Larger self-managed attack surface</text:p>
          </table:table-cell>
        </table:table-row>
        <table:table-row>
          <table:table-cell table:style-name="Table5.A1" office:value-type="string">
            <text:p text:style-name="P7">OPERATIONAL_TECHNOLOGY</text:p>
          </table:table-cell>
          <table:table-cell table:style-name="Table5.A1" office:value-type="string">
            <text:p text:style-name="P7">+0.20</text:p>
          </table:table-cell>
          <table:table-cell table:style-name="Table5.A1" office:value-type="string">
            <text:p text:style-name="P7">Legacy protocols, difficult to patch, air-gap violations</text:p>
          </table:table-cell>
        </table:table-row>
      </table:table>
      <text:p text:style-name="P2"/>
      <text:p text:style-name="P2">Max across types.</text:p>
      <text:p text:style-name="P2"/>
      <text:p text:style-name="P2">Step 6: Geographic exposure modifier</text:p>
      <text:p text:style-name="P2"/>
      <table:table table:name="Table6" table:style-name="Table6">
        <table:table-column table:style-name="Table6.A" table:number-columns-repeated="3"/>
        <table:table-row>
          <table:table-cell table:style-name="Table6.A1" office:value-type="string">
            <text:p text:style-name="P7">Scope</text:p>
          </table:table-cell>
          <table:table-cell table:style-name="Table6.A1" office:value-type="string">
            <text:p text:style-name="Table_20_Contents">β_geo</text:p>
          </table:table-cell>
          <table:table-cell table:style-name="Table6.A1" office:value-type="string">
            <text:p text:style-name="Table_20_Contents">Rationale</text:p>
          </table:table-cell>
        </table:table-row>
        <table:table-row>
          <table:table-cell table:style-name="Table6.A1" office:value-type="string">
            <text:p text:style-name="Table_20_Contents">LOCAL</text:p>
          </table:table-cell>
          <table:table-cell table:style-name="Table6.A1" office:value-type="string">
            <text:p text:style-name="Table_20_Contents">-0.10</text:p>
          </table:table-cell>
          <table:table-cell table:style-name="Table6.A1" office:value-type="string">
            <text:p text:style-name="Table_20_Contents">Smaller threat actor pool</text:p>
          </table:table-cell>
        </table:table-row>
        <text:soft-page-break/>
        <table:table-row>
          <table:table-cell table:style-name="Table6.A1" office:value-type="string">
            <text:p text:style-name="Table_20_Contents">REGIONAL/NATIONAL</text:p>
          </table:table-cell>
          <table:table-cell table:style-name="Table6.A1" office:value-type="string">
            <text:p text:style-name="Table_20_Contents">0.00</text:p>
          </table:table-cell>
          <table:table-cell table:style-name="Table6.A1" office:value-type="string">
            <text:p text:style-name="Table_20_Contents">Baseline</text:p>
          </table:table-cell>
        </table:table-row>
        <table:table-row>
          <table:table-cell table:style-name="Table6.A1" office:value-type="string">
            <text:p text:style-name="Table_20_Contents">EUROPEAN</text:p>
          </table:table-cell>
          <table:table-cell table:style-name="Table6.A1" office:value-type="string">
            <text:p text:style-name="Table_20_Contents">+0.05</text:p>
          </table:table-cell>
          <table:table-cell table:style-name="Table6.A1" office:value-type="string">
            <text:p text:style-name="Table_20_Contents">More exposure points</text:p>
          </table:table-cell>
        </table:table-row>
        <table:table-row>
          <table:table-cell table:style-name="Table6.A1" office:value-type="string">
            <text:p text:style-name="Table_20_Contents">GLOBAL</text:p>
          </table:table-cell>
          <table:table-cell table:style-name="Table6.A1" office:value-type="string">
            <text:p text:style-name="Table_20_Contents">+0.10</text:p>
          </table:table-cell>
          <table:table-cell table:style-name="Table6.A1" office:value-type="string">
            <text:p text:style-name="Table_20_Contents">Widest threat actor exposure</text:p>
          </table:table-cell>
        </table:table-row>
      </table:table>
      <text:p text:style-name="P3"/>
      <text:p text:style-name="P3">---</text:p>
      <text:p text:style-name="P3"/>
      <text:p text:style-name="P3">Suggested additional parameters (would improve accuracy)</text:p>
      <text:p text:style-name="Standard"/>
      <text:p text:style-name="Standard">These are not currently in the org profile but would significantly improve the calculation:</text:p>
      <text:p text:style-name="Standard"/>
      <text:p text:style-name="P3">1. <text:span text:style-name="T1">Internet-facing service count</text:span> (0, 1–5, 6–20, 20+) — directly maps to attack surface. Source: Cyentia IRIS shows breach probability scales with number of internet-facing assets.</text:p>
      <text:p text:style-name="P3"/>
      <text:p text:style-name="P3">2. <text:span text:style-name="T1">Remote workforce percentage</text:span> (0–25%, 25–50%, 50–75%, 75–100%) — expanded perimeter, VPN/RDP exposure. Source: IBM 2024 reports remote work as a cost amplifier; Verizon DBIR shows VPN/RDP as top initial access vectors.</text:p>
      <text:p text:style-name="P3"/>
      <text:p text:style-name="P3">3. <text:span text:style-name="T1">Third-party vendor count with system access</text:span> (0–5, 5–20, 20–50, 50+) — supply chain risk. Source: IBM 2024: third-party breaches cost $4.55M vs $4.35M average; Cyentia: ~60% of breaches involve a third party.</text:p>
      <text:p text:style-name="P3"/>
      <text:p text:style-name="P3">4. <text:span text:style-name="T1">Previous breach history</text:span> (yes/no in last 3 years) — strongest actuarial predictor. Source: IBM: organizations that have been breached before face 12.6% higher costs; Cyentia IRIS: prior breach is the single strongest predictor of future breach (roughly 2× the odds).</text:p>
      <text:p text:style-name="P3"/>
      <text:p text:style-name="P3">5. <text:span text:style-name="T1">Dedicated security personnel</text:span> (none, part-time/shared, full-time, team) — resource proxy. Source: Hiscox 2024 shows strong correlation between dedicated security staff and incident prevention in SMEs.</text:p>
      <text:p text:style-name="P3"/>
      <text:p text:style-name="P8">6. <text:span text:style-name="T1">Phishing simulation failure rate</text:span> (if available) — human factor calibration. Source: Verizon DBIR 2024: 68% of breaches involved a human element.</text:p>
      <text:p text:style-name="P8"/>
      <text:p text:style-name="P8">---</text:p>
      <text:p text:style-name="P8"/>
      <text:p text:style-name="P9">Example calculation</text:p>
      <text:p text:style-name="P9"/>
      <text:p text:style-name="P8">A medium-sized (50–249 employees) financial services company, B2B, handling customer PII + payment card data, hybrid infrastructure, European scope, average CMMI of 2.5 across all safeguards:</text:p>
      <text:p text:style-name="P8"/>
      <text:p text:style-name="P8">P_base <text:s text:c="6"/>= 0.18 <text:s text:c="7"/>→ logit = -1.516</text:p>
      <text:p text:style-name="P8">β_industry <text:s text:c="2"/>= +0.30 <text:s text:c="6"/>(Financial)</text:p>
      <text:p text:style-name="P8">β_maturity <text:s text:c="2"/>= -0.8 × ((2.5-1)/4) = -0.30</text:p>
      <text:p text:style-name="P8">β_data <text:s text:c="6"/>= +0.20 <text:s text:c="6"/>(Payment card — max)</text:p>
      <text:p text:style-name="P8">β_infra <text:s text:c="5"/>= +0.05 <text:s text:c="6"/>(Hybrid)</text:p>
      <text:p text:style-name="P8">β_geo <text:s text:c="7"/>= +0.05 <text:s text:c="6"/>(European)</text:p>
      <text:p text:style-name="P8"/>
      <text:p text:style-name="P8">logit(P) = -1.516 + 0.30 - 0.30 + 0.20 + 0.05 + 0.05 = -1.216</text:p>
      <text:p text:style-name="P8"/>
      <text:p text:style-name="P8">P_annual = sigmoid(-1.216) = 22.9%</text:p>
      <text:p text:style-name="P8"/>
      <text:p text:style-name="P8">With a ±30% confidence band (matching existing CONC): 16.0% – 29.8%</text:p>
      <text:p text:style-name="P8"><text:soft-page-break/></text:p>
      <text:p text:style-name="P8">If that same company improved to average CMMI 4.0:</text:p>
      <text:p text:style-name="P8">β_maturity = -0.8 × ((4.0-1)/4) = -0.60</text:p>
      <text:p text:style-name="P8">logit(P) = -1.516 + 0.30 - 0.60 + 0.20 + 0.05 + 0.05 = -1.516</text:p>
      <text:p text:style-name="P8">P_annual = 18.0% <text:s/>(band: 12.6% – 23.4%)</text:p>
      <text:p text:style-name="P8"/>
      <text:p text:style-name="P8">This shows the actionable impact of control maturity — the core value proposition for Compliance Circle users.</text:p>
      <text:p text:style-name="P8"/>
      <text:p text:style-name="P8">---</text:p>
      <text:p text:style-name="P8"/>
      <text:p text:style-name="P9">Scientific foundations</text:p>
      <text:p text:style-name="Standard"/>
      <text:p text:style-name="Standard"><text:s text:c="2"/>┌─────────────────────────────────────────────────────────────────────────────────┬─────────────────────────────────────────────────────────────────────────────────────────────────────────────────────────────────────────────┐</text:p>
      <text:p text:style-name="Standard"><text:s text:c="2"/>│ <text:s text:c="36"/>Source <text:s text:c="37"/>│ <text:s text:c="61"/>What it provides <text:s text:c="62"/>│</text:p>
      <text:p text:style-name="Standard"><text:s text:c="2"/>├─────────────────────────────────────────────────────────────────────────────────┼─────────────────────────────────────────────────────────────────────────────────────────────────────────────────────────────────────────────┤</text:p>
      <text:p text:style-name="Standard"><text:s text:c="2"/>│ FAIR Standard (Open Group O-RA) <text:s text:c="48"/>│ Framework: Loss Event Frequency = Threat Event Frequency × Vulnerability. Our model implements this with base rate (TEF proxy) × maturity <text:s text:c="2"/>│</text:p>
      <text:p text:style-name="Standard"><text:s text:c="2"/>│ <text:s text:c="80"/>│ adjustments (vulnerability proxy) <text:s text:c="106"/>│</text:p>
      <text:p text:style-name="Standard"><text:s text:c="2"/>├─────────────────────────────────────────────────────────────────────────────────┼─────────────────────────────────────────────────────────────────────────────────────────────────────────────────────────────────────────────┤</text:p>
      <text:p text:style-name="Standard"><text:s text:c="2"/>│ Cyentia Institute IRIS (2020–2024) <text:s text:c="45"/>│ Actuarial breach frequency data by company size band and industry. The log-linear size relationship and the base rates come from here <text:s text:c="6"/>│</text:p>
      <text:p text:style-name="Standard"><text:s text:c="2"/>├─────────────────────────────────────────────────────────────────────────────────┼─────────────────────────────────────────────────────────────────────────────────────────────────────────────────────────────────────────────┤</text:p>
      <text:p text:style-name="Standard"><text:s text:c="2"/>│ Verizon DBIR (annual) <text:s text:c="58"/>│ Industry-specific attack frequency, vector distribution, human element contribution <text:s text:c="56"/>│</text:p>
      <text:p text:style-name="Standard"><text:s text:c="2"/>├─────────────────────────────────────────────────────────────────────────────────┼─────────────────────────────<text:soft-page-break/>────────────────────────────────────────────────────────────────────────────────────────────────────────────────┤</text:p>
      <text:p text:style-name="Standard"><text:s text:c="2"/>│ IBM/Ponemon Cost of a Data Breach (2024) <text:s text:c="39"/>│ 24-month breach probability (~27%), security maturity impact, sector differentials <text:s text:c="57"/>│</text:p>
      <text:p text:style-name="Standard"><text:s text:c="2"/>├─────────────────────────────────────────────────────────────────────────────────┼─────────────────────────────────────────────────────────────────────────────────────────────────────────────────────────────────────────────┤</text:p>
      <text:p text:style-name="Standard"><text:s text:c="2"/>│ Hiscox Cyber Readiness Report (2024) <text:s text:c="43"/>│ European SME-specific breach rates, cost-by-size data <text:s text:c="86"/>│</text:p>
      <text:p text:style-name="Standard"><text:s text:c="2"/>├─────────────────────────────────────────────────────────────────────────────────┼─────────────────────────────────────────────────────────────────────────────────────────────────────────────────────────────────────────────┤</text:p>
      <text:p text:style-name="Standard"><text:s text:c="2"/>│ Romanosky (2016) — "Examining the Costs and Causes of Cyber Incidents", Journal │ Peer-reviewed empirical analysis: breach probability scales with company size, industry, and data volume <text:s text:c="35"/>│</text:p>
      <text:p text:style-name="Standard"><text:s text:c="2"/>│ <text:s/>of Cybersecurity <text:s text:c="62"/>│ <text:s text:c="140"/>│</text:p>
      <text:p text:style-name="Standard"><text:s text:c="2"/>├─────────────────────────────────────────────────────────────────────────────────┼─────────────────────────────────────────────────────────────────────────────────────────────────────────────────────────────────────────────┤</text:p>
      <text:p text:style-name="Standard"><text:s text:c="2"/>│ Edwards, Hofmeyr &amp; Forrest (2016) — "Hype and Heavy Tails", Journal of <text:s text:c="9"/>│ Empirical breach frequency distributions; supports logistic model over simple linear <text:s text:c="55"/>│</text:p>
      <text:p text:style-name="Standard"><text:s text:c="2"/>│ Cybersecurity <text:s text:c="66"/>│ <text:s text:c="140"/>│</text:p>
      <text:p text:style-name="Standard"><text:s text:c="2"/>├─────────────────────────────────────────────────────────────────────────────────┼─────────────────────────────────────────────────────────────────────────────────────────────────────────────────────────────────────────────┤</text:p>
      <text:p text:style-name="Standard"><text:s text:c="2"/>│ Hubbard &amp; Seiersen (2016) — How to Measure Anything in Cybersecurity Risk, <text:s text:c="5"/>│ Calibrated estimation methodology, range estimates, Bayesian updating — already referenced in your CONC methodology <text:s text:c="24"/>│</text:p>
      <text:p text:style-name="Standard"><text:s text:c="2"/>│ Wiley <text:s text:c="74"/>│ <text:s text:c="140"/>│</text:p>
      <text:p text:style-name="Standard"><text:s text:c="2"/>├─────────────────────────────────────────────────────────────────────────────────┼─────────────────────────────────────────────────────────────────────────────────────<text:soft-page-break/>────────────────────────────────────────────────────────┤</text:p>
      <text:p text:style-name="Standard"><text:s text:c="2"/>│ Gordon &amp; Loeb (2002) — ACM TISSEC <text:s text:c="46"/>│ Optimal security investment framework — already referenced; breach probability is the input variable to their model <text:s text:c="24"/>│</text:p>
      <text:p text:style-name="Standard"><text:s text:c="2"/>├─────────────────────────────────────────────────────────────────────────────────┼─────────────────────────────────────────────────────────────────────────────────────────────────────────────────────────────────────────────┤</text:p>
      <text:p text:style-name="Standard"><text:s text:c="2"/>│ ENISA Threat Landscape (2024) <text:s text:c="50"/>│ European threat frequency data, SME-specific risk profiles <text:s text:c="81"/>│</text:p>
      <text:p text:style-name="Standard"><text:s text:c="2"/>├─────────────────────────────────────────────────────────────────────────────────┼─────────────────────────────────────────────────────────────────────────────────────────────────────────────────────────────────────────────┤</text:p>
      <text:p text:style-name="Standard"><text:s text:c="2"/>│ NIST SP 800-30 Rev. 1 <text:s text:c="58"/>│ Likelihood assessment methodology (qualitative → semi-quantitative mapping) <text:s text:c="64"/>│</text:p>
      <text:p text:style-name="Standard"><text:s text:c="2"/>└─────────────────────────────────────────────────────────────────────────────────┴─────────────────────────────────────────────────────────────────────────────────────────────────────────────────────────────────────────────┘</text:p>
      <text:p text:style-name="Standard"/>
      <text:p text:style-name="Standard"><text:s text:c="2"/>The logistic regression approach is standard in actuarial risk modelling and is the mathematical backbone of most cyber insurance pricing models (used by carriers like Hiscox, Beazley, and Munich Re's cyber divi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5T15:58:51.475679892</meta:creation-date>
    <dc:date>2026-03-15T16:23:05.854068864</dc:date>
    <meta:editing-duration>PT2M1S</meta:editing-duration>
    <meta:editing-cycles>1</meta:editing-cycles>
    <meta:document-statistic meta:table-count="6" meta:image-count="0" meta:object-count="0" meta:page-count="7" meta:paragraph-count="246" meta:word-count="1391" meta:character-count="15012" meta:non-whitespace-character-count="11045"/>
    <meta:generator>LibreOffice/25.8.5.2$Linux_X86_64 LibreOffice_project/252c20f6956e3db0b52e6e2f9dda67263513c8fc</meta:generator>
  </office:meta>
</office:document-meta>
</file>