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adornments="Bold" style:font-pitch="variable"/>
    <style:font-face style:name="Ubuntu Sans" svg:font-family="'Ubuntu Sans'" style:font-family-generic="swiss" style:font-pitch="variable"/>
    <style:font-face style:name="Ubuntu1" svg:font-family="Ubuntu" style:font-adornments="Regular"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1.7" style:family="table-row">
      <style:table-row-properties style:min-row-height="0.1549in"/>
    </style:style>
    <style:style style:name="Table1.8" style:family="table-row">
      <style:table-row-properties style:min-row-height="0.2208in"/>
    </style:style>
    <style:style style:name="Table2" style:family="table">
      <style:table-properties style:width="6.6931in" table:align="margins" style:writing-mode="lr-tb"/>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3" style:family="table">
      <style:table-properties style:width="6.6931in" table:align="margins" style:writing-mode="lr-tb"/>
    </style:style>
    <style:style style:name="Table3.A" style:family="table-column">
      <style:table-column-properties style:column-width="2.2313in" style:rel-column-width="21845*"/>
    </style:style>
    <style:style style:name="Table3.A1" style:family="table-cell">
      <style:table-cell-properties style:writing-mode="page"/>
    </style:style>
    <style:style style:name="Table4" style:family="table">
      <style:table-properties style:width="5.3125in" table:align="left" style:writing-mode="lr-tb"/>
    </style:style>
    <style:style style:name="Table4.A" style:family="table-column">
      <style:table-column-properties style:column-width="1.6854in"/>
    </style:style>
    <style:style style:name="Table4.B" style:family="table-column">
      <style:table-column-properties style:column-width="1.4396in"/>
    </style:style>
    <style:style style:name="Table4.C" style:family="table-column">
      <style:table-column-properties style:column-width="0.5778in"/>
    </style:style>
    <style:style style:name="Table4.D" style:family="table-column">
      <style:table-column-properties style:column-width="1.6097in"/>
    </style:style>
    <style:style style:name="Table4.A1" style:family="table-cell">
      <style:table-cell-properties fo:padding="0in" fo:border="none" style:writing-mode="page"/>
    </style:style>
    <style:style style:name="P1" style:family="paragraph" style:parent-style-name="Title">
      <style:text-properties style:font-name="Ubuntu Sans"/>
    </style:style>
    <style:style style:name="P2" style:family="paragraph" style:parent-style-name="Standard">
      <style:text-properties officeooo:paragraph-rsid="000f16ce"/>
    </style:style>
    <style:style style:name="P3" style:family="paragraph" style:parent-style-name="Standard">
      <style:text-properties officeooo:paragraph-rsid="000fae46"/>
    </style:style>
    <style:style style:name="P4" style:family="paragraph" style:parent-style-name="Standard">
      <style:text-properties fo:font-weight="bold" officeooo:paragraph-rsid="000fae46" style:font-weight-asian="bold" style:font-weight-complex="bold"/>
    </style:style>
    <style:style style:name="P5" style:family="paragraph" style:parent-style-name="Standard">
      <style:paragraph-properties fo:break-before="page"/>
      <style:text-properties officeooo:paragraph-rsid="000fae46"/>
    </style:style>
    <style:style style:name="P6" style:family="paragraph" style:parent-style-name="Standard">
      <style:paragraph-properties style:writing-mode="lr-tb"/>
      <style:text-properties officeooo:paragraph-rsid="000f16ce"/>
    </style:style>
    <style:style style:name="P7" style:family="paragraph" style:parent-style-name="Standard">
      <style:paragraph-properties style:writing-mode="lr-tb"/>
      <style:text-properties officeooo:paragraph-rsid="000fae46"/>
    </style:style>
    <style:style style:name="P8" style:family="paragraph" style:parent-style-name="Standard">
      <style:paragraph-properties style:writing-mode="lr-tb"/>
      <style:text-properties fo:font-weight="bold" officeooo:paragraph-rsid="000fae46" style:font-weight-asian="bold" style:font-weight-complex="bold"/>
    </style:style>
    <style:style style:name="P9" style:family="paragraph" style:parent-style-name="Standard">
      <style:paragraph-properties style:writing-mode="lr-tb"/>
      <style:text-properties fo:font-weight="bold" officeooo:rsid="002f4561" officeooo:paragraph-rsid="002f4561" style:font-weight-asian="bold" style:font-weight-complex="bold"/>
    </style:style>
    <style:style style:name="P10" style:family="paragraph" style:parent-style-name="Standard">
      <style:paragraph-properties style:writing-mode="lr-tb"/>
      <style:text-properties fo:font-weight="bold" officeooo:rsid="002234dc" officeooo:paragraph-rsid="002234dc" style:font-weight-asian="bold" style:font-weight-complex="bold"/>
    </style:style>
    <style:style style:name="P11" style:family="paragraph" style:parent-style-name="Standard">
      <style:paragraph-properties style:writing-mode="lr-tb"/>
      <style:text-properties fo:font-weight="normal" officeooo:rsid="00285a79" officeooo:paragraph-rsid="00285a79" style:font-weight-asian="normal" style:font-weight-complex="normal"/>
    </style:style>
    <style:style style:name="P12" style:family="paragraph" style:parent-style-name="Standard">
      <style:paragraph-properties style:writing-mode="lr-tb"/>
      <style:text-properties fo:font-style="italic" fo:font-weight="normal" officeooo:rsid="00285a79" officeooo:paragraph-rsid="00285a79" style:font-style-asian="italic" style:font-weight-asian="normal" style:font-style-complex="italic" style:font-weight-complex="normal"/>
    </style:style>
    <style:style style:name="P13" style:family="paragraph" style:parent-style-name="Standard">
      <style:paragraph-properties style:writing-mode="lr-tb"/>
      <style:text-properties fo:font-weight="bold" officeooo:rsid="002234dc" officeooo:paragraph-rsid="00285a79" style:font-weight-asian="bold" style:font-weight-complex="bold"/>
    </style:style>
    <style:style style:name="P14" style:family="paragraph" style:parent-style-name="Standard">
      <style:paragraph-properties style:writing-mode="lr-tb"/>
      <style:text-properties fo:font-weight="normal" officeooo:rsid="002234dc" officeooo:paragraph-rsid="002234dc" style:font-weight-asian="normal" style:font-weight-complex="normal"/>
    </style:style>
    <style:style style:name="P15" style:family="paragraph" style:parent-style-name="Parameter">
      <style:paragraph-properties fo:margin-top="0in" fo:margin-bottom="0in" style:contextual-spacing="false"/>
    </style:style>
    <style:style style:name="P16" style:family="paragraph" style:parent-style-name="Standard">
      <style:paragraph-properties style:writing-mode="lr-tb"/>
      <style:text-properties fo:font-weight="normal" officeooo:rsid="00243052" officeooo:paragraph-rsid="00285a79" style:font-weight-asian="normal" style:font-weight-complex="normal"/>
    </style:style>
    <style:style style:name="P17" style:family="paragraph" style:parent-style-name="Standard">
      <style:paragraph-properties style:writing-mode="lr-tb"/>
      <style:text-properties fo:font-weight="bold" officeooo:rsid="002234dc" officeooo:paragraph-rsid="00262d49" style:font-weight-asian="bold" style:font-weight-complex="bold"/>
    </style:style>
    <style:style style:name="P18" style:family="paragraph" style:parent-style-name="Standard">
      <style:paragraph-properties style:writing-mode="lr-tb"/>
      <style:text-properties fo:font-weight="normal" officeooo:rsid="00267ca1" officeooo:paragraph-rsid="00267ca1" style:font-weight-asian="normal" style:font-weight-complex="normal"/>
    </style:style>
    <style:style style:name="P19" style:family="paragraph" style:parent-style-name="Standard">
      <style:paragraph-properties style:writing-mode="lr-tb"/>
      <style:text-properties officeooo:paragraph-rsid="00291618"/>
    </style:style>
    <style:style style:name="P20" style:family="paragraph" style:parent-style-name="Standard">
      <style:paragraph-properties style:writing-mode="lr-tb"/>
      <style:text-properties fo:font-weight="bold" officeooo:paragraph-rsid="00267ca1" style:font-weight-asian="bold" style:font-weight-complex="bold"/>
    </style:style>
    <style:style style:name="P21" style:family="paragraph" style:parent-style-name="Standard">
      <style:paragraph-properties style:writing-mode="lr-tb"/>
      <style:text-properties fo:font-weight="normal" officeooo:paragraph-rsid="000fae46" style:font-weight-asian="normal" style:font-weight-complex="normal"/>
    </style:style>
    <style:style style:name="P22" style:family="paragraph" style:parent-style-name="Standard">
      <style:paragraph-properties style:writing-mode="lr-tb"/>
      <style:text-properties fo:font-weight="normal" officeooo:paragraph-rsid="00267ca1" style:font-weight-asian="normal" style:font-weight-complex="normal"/>
    </style:style>
    <style:style style:name="P23" style:family="paragraph" style:parent-style-name="Standard">
      <style:paragraph-properties style:writing-mode="lr-tb"/>
      <style:text-properties fo:font-weight="normal" officeooo:paragraph-rsid="0029eec2" style:font-weight-asian="normal" style:font-weight-complex="normal"/>
    </style:style>
    <style:style style:name="P24" style:family="paragraph" style:parent-style-name="Standard">
      <style:paragraph-properties style:writing-mode="lr-tb"/>
      <style:text-properties officeooo:rsid="0029eec2" officeooo:paragraph-rsid="0029eec2"/>
    </style:style>
    <style:style style:name="P25" style:family="paragraph" style:parent-style-name="Standard">
      <style:paragraph-properties style:writing-mode="lr-tb"/>
      <style:text-properties officeooo:paragraph-rsid="002a88a9"/>
    </style:style>
    <style:style style:name="P26" style:family="paragraph" style:parent-style-name="Standard">
      <style:paragraph-properties style:writing-mode="lr-tb"/>
      <style:text-properties officeooo:rsid="002a88a9" officeooo:paragraph-rsid="002a88a9"/>
    </style:style>
    <style:style style:name="P27" style:family="paragraph" style:parent-style-name="Standard">
      <style:paragraph-properties style:writing-mode="lr-tb"/>
      <style:text-properties fo:font-style="italic" fo:font-weight="normal" officeooo:rsid="00285a79" officeooo:paragraph-rsid="002a88a9" style:font-style-asian="italic" style:font-weight-asian="normal" style:font-style-complex="italic" style:font-weight-complex="normal"/>
    </style:style>
    <style:style style:name="P28" style:family="paragraph" style:parent-style-name="Standard">
      <style:paragraph-properties style:writing-mode="lr-tb"/>
      <style:text-properties fo:font-weight="bold" officeooo:rsid="002234dc" officeooo:paragraph-rsid="002a88a9" style:font-weight-asian="bold" style:font-weight-complex="bold"/>
    </style:style>
    <style:style style:name="P29" style:family="paragraph" style:parent-style-name="Parameter">
      <style:text-properties officeooo:paragraph-rsid="002a88a9"/>
    </style:style>
    <style:style style:name="P30" style:family="paragraph" style:parent-style-name="Parameter">
      <style:text-properties officeooo:rsid="002a88a9" officeooo:paragraph-rsid="002a88a9"/>
    </style:style>
    <style:style style:name="P31" style:family="paragraph" style:parent-style-name="Standard">
      <style:paragraph-properties style:writing-mode="lr-tb"/>
      <style:text-properties fo:font-weight="bold" officeooo:rsid="002234dc" officeooo:paragraph-rsid="002b658e" style:font-weight-asian="bold" style:font-weight-complex="bold"/>
    </style:style>
    <style:style style:name="P32" style:family="paragraph" style:parent-style-name="Standard">
      <style:paragraph-properties style:writing-mode="lr-tb"/>
      <style:text-properties fo:font-weight="normal" officeooo:rsid="002b658e" officeooo:paragraph-rsid="002b658e" style:font-weight-asian="normal" style:font-weight-complex="normal"/>
    </style:style>
    <style:style style:name="P33" style:family="paragraph" style:parent-style-name="Standard">
      <style:paragraph-properties style:writing-mode="lr-tb"/>
      <style:text-properties fo:font-weight="normal" officeooo:rsid="002a88a9" officeooo:paragraph-rsid="0034f911" style:font-weight-asian="normal" style:font-weight-complex="normal"/>
    </style:style>
    <style:style style:name="P34" style:family="paragraph" style:parent-style-name="Standard">
      <style:paragraph-properties style:writing-mode="lr-tb"/>
      <style:text-properties fo:font-style="italic" fo:font-weight="normal" officeooo:rsid="00285a79" officeooo:paragraph-rsid="0034f911" style:font-style-asian="italic" style:font-weight-asian="normal" style:font-style-complex="italic" style:font-weight-complex="normal"/>
    </style:style>
    <style:style style:name="P35" style:family="paragraph" style:parent-style-name="Standard">
      <style:paragraph-properties style:writing-mode="lr-tb"/>
      <style:text-properties fo:font-weight="normal" officeooo:rsid="0034f911" officeooo:paragraph-rsid="003570a2" style:font-weight-asian="normal" style:font-weight-complex="normal"/>
    </style:style>
    <style:style style:name="P36" style:family="paragraph" style:parent-style-name="Standard">
      <style:paragraph-properties style:writing-mode="lr-tb"/>
      <style:text-properties fo:font-weight="normal" officeooo:rsid="0034f911" officeooo:paragraph-rsid="0034f911" style:font-weight-asian="normal" style:font-weight-complex="normal"/>
    </style:style>
    <style:style style:name="P37" style:family="paragraph" style:parent-style-name="Standard">
      <style:paragraph-properties style:writing-mode="lr-tb"/>
      <style:text-properties fo:font-weight="normal" officeooo:rsid="002b658e" officeooo:paragraph-rsid="0034f911" style:font-weight-asian="normal" style:font-weight-complex="normal"/>
    </style:style>
    <style:style style:name="P38" style:family="paragraph" style:parent-style-name="Standard">
      <style:paragraph-properties style:writing-mode="lr-tb"/>
      <style:text-properties fo:font-weight="normal" officeooo:rsid="002b658e" officeooo:paragraph-rsid="00351fb9" style:font-weight-asian="normal" style:font-weight-complex="normal"/>
    </style:style>
    <style:style style:name="P39" style:family="paragraph" style:parent-style-name="Standard">
      <style:paragraph-properties style:writing-mode="lr-tb"/>
      <style:text-properties fo:font-weight="normal" officeooo:rsid="0034f911" officeooo:paragraph-rsid="00351fb9" style:font-weight-asian="normal" style:font-weight-complex="normal"/>
    </style:style>
    <style:style style:name="P40" style:family="paragraph" style:parent-style-name="Standard">
      <style:paragraph-properties style:writing-mode="lr-tb"/>
      <style:text-properties fo:font-style="italic" fo:font-weight="normal" officeooo:rsid="00285a79" officeooo:paragraph-rsid="00351fb9" style:font-style-asian="italic" style:font-weight-asian="normal" style:font-style-complex="italic" style:font-weight-complex="normal"/>
    </style:style>
    <style:style style:name="P41" style:family="paragraph" style:parent-style-name="Standard">
      <style:text-properties officeooo:rsid="0034f911" officeooo:paragraph-rsid="00351fb9"/>
    </style:style>
    <style:style style:name="P42" style:family="paragraph" style:parent-style-name="Standard">
      <style:paragraph-properties style:writing-mode="lr-tb"/>
      <style:text-properties officeooo:rsid="00351fb9" officeooo:paragraph-rsid="00351fb9"/>
    </style:style>
    <style:style style:name="P43" style:family="paragraph" style:parent-style-name="Standard">
      <style:text-properties officeooo:rsid="00351fb9" officeooo:paragraph-rsid="00351fb9"/>
    </style:style>
    <style:style style:name="P44" style:family="paragraph" style:parent-style-name="Standard">
      <style:paragraph-properties fo:break-before="page" style:writing-mode="lr-tb"/>
      <style:text-properties officeooo:paragraph-rsid="00116fc0"/>
    </style:style>
    <style:style style:name="P45" style:family="paragraph" style:parent-style-name="Standard">
      <style:paragraph-properties style:writing-mode="lr-tb"/>
      <style:text-properties fo:font-weight="bold" officeooo:paragraph-rsid="00116fc0" style:font-weight-asian="bold" style:font-weight-complex="bold"/>
    </style:style>
    <style:style style:name="P46" style:family="paragraph" style:parent-style-name="Standard">
      <style:paragraph-properties style:writing-mode="lr-tb"/>
      <style:text-properties fo:font-weight="bold" officeooo:rsid="002f4561" officeooo:paragraph-rsid="003a1435" style:font-weight-asian="bold" style:font-weight-complex="bold"/>
    </style:style>
    <style:style style:name="P47" style:family="paragraph" style:parent-style-name="Standard">
      <style:paragraph-properties style:writing-mode="lr-tb"/>
      <style:text-properties officeooo:paragraph-rsid="003a1435"/>
    </style:style>
    <style:style style:name="P48" style:family="paragraph" style:parent-style-name="Standard">
      <style:paragraph-properties style:writing-mode="lr-tb"/>
      <style:text-properties fo:font-weight="bold" officeooo:paragraph-rsid="003a1435" style:font-weight-asian="bold" style:font-weight-complex="bold"/>
    </style:style>
    <style:style style:name="P49" style:family="paragraph" style:parent-style-name="Standard">
      <style:paragraph-properties style:writing-mode="lr-tb"/>
      <style:text-properties fo:font-weight="bold" officeooo:rsid="002234dc" officeooo:paragraph-rsid="003a1435" style:font-weight-asian="bold" style:font-weight-complex="bold"/>
    </style:style>
    <style:style style:name="P50" style:family="paragraph" style:parent-style-name="Standard">
      <style:paragraph-properties style:writing-mode="lr-tb"/>
      <style:text-properties fo:font-weight="normal" officeooo:rsid="00285a79" officeooo:paragraph-rsid="003a1435" style:font-weight-asian="normal" style:font-weight-complex="normal"/>
    </style:style>
    <style:style style:name="P51" style:family="paragraph" style:parent-style-name="Standard">
      <style:paragraph-properties style:writing-mode="lr-tb"/>
      <style:text-properties fo:font-style="italic" fo:font-weight="normal" officeooo:rsid="00285a79" officeooo:paragraph-rsid="003a1435" style:font-style-asian="italic" style:font-weight-asian="normal" style:font-style-complex="italic" style:font-weight-complex="normal"/>
    </style:style>
    <style:style style:name="P52" style:family="paragraph" style:parent-style-name="Parameter">
      <style:text-properties officeooo:paragraph-rsid="003a1435"/>
    </style:style>
    <style:style style:name="P53" style:family="paragraph" style:parent-style-name="Standard">
      <style:paragraph-properties style:writing-mode="lr-tb"/>
      <style:text-properties officeooo:paragraph-rsid="00116fc0"/>
    </style:style>
    <style:style style:name="P54" style:family="paragraph" style:parent-style-name="Standard">
      <style:paragraph-properties fo:break-before="page" style:writing-mode="lr-tb"/>
      <style:text-properties fo:font-weight="bold" officeooo:paragraph-rsid="00116fc0" style:font-weight-asian="bold" style:font-weight-complex="bold"/>
    </style:style>
    <style:style style:name="P55" style:family="paragraph" style:parent-style-name="Standard">
      <style:paragraph-properties style:writing-mode="lr-tb"/>
      <style:text-properties officeooo:paragraph-rsid="0012b6e9"/>
    </style:style>
    <style:style style:name="P56" style:family="paragraph" style:parent-style-name="Standard">
      <style:paragraph-properties style:writing-mode="lr-tb"/>
      <style:text-properties officeooo:paragraph-rsid="0013682a"/>
    </style:style>
    <style:style style:name="P57" style:family="paragraph" style:parent-style-name="Standard">
      <style:paragraph-properties style:writing-mode="lr-tb"/>
      <style:text-properties officeooo:paragraph-rsid="00137d3d"/>
    </style:style>
    <style:style style:name="P58" style:family="paragraph" style:parent-style-name="Standard">
      <style:paragraph-properties fo:break-before="page" style:writing-mode="lr-tb"/>
      <style:text-properties fo:font-weight="bold" officeooo:paragraph-rsid="0013682a" style:font-weight-asian="bold" style:font-weight-complex="bold"/>
    </style:style>
    <style:style style:name="P59" style:family="paragraph" style:parent-style-name="Standard">
      <style:paragraph-properties style:writing-mode="lr-tb"/>
      <style:text-properties fo:font-weight="bold" officeooo:paragraph-rsid="0013682a" style:font-weight-asian="bold" style:font-weight-complex="bold"/>
    </style:style>
    <style:style style:name="P60" style:family="paragraph" style:parent-style-name="Standard">
      <style:paragraph-properties style:writing-mode="lr-tb"/>
      <style:text-properties fo:font-weight="normal" officeooo:paragraph-rsid="0013682a" style:font-weight-asian="normal" style:font-weight-complex="normal"/>
    </style:style>
    <style:style style:name="P61" style:family="paragraph" style:parent-style-name="Table_20_Contents">
      <style:text-properties officeooo:rsid="00152e6d" officeooo:paragraph-rsid="00152e6d"/>
    </style:style>
    <style:style style:name="P62" style:family="paragraph" style:parent-style-name="Standard">
      <style:paragraph-properties style:writing-mode="lr-tb"/>
      <style:text-properties fo:font-weight="normal" officeooo:rsid="00152e6d" officeooo:paragraph-rsid="00152e6d" style:font-weight-asian="normal" style:font-weight-complex="normal"/>
    </style:style>
    <style:style style:name="P63" style:family="paragraph" style:parent-style-name="Standard">
      <style:paragraph-properties fo:break-before="page" style:writing-mode="lr-tb"/>
      <style:text-properties fo:font-weight="bold" officeooo:rsid="00152e6d" officeooo:paragraph-rsid="00152e6d" style:font-weight-asian="bold" style:font-weight-complex="bold"/>
    </style:style>
    <style:style style:name="P64" style:family="paragraph" style:parent-style-name="Table_20_Contents">
      <style:text-properties officeooo:rsid="0016e252" officeooo:paragraph-rsid="0016e252"/>
    </style:style>
    <style:style style:name="P65" style:family="paragraph" style:parent-style-name="Table_20_Contents">
      <style:text-properties officeooo:rsid="0018d03a" officeooo:paragraph-rsid="0018d03a"/>
    </style:style>
    <style:style style:name="P66" style:family="paragraph" style:parent-style-name="Table_20_Contents">
      <style:text-properties officeooo:rsid="001ca836" officeooo:paragraph-rsid="001ca836"/>
    </style:style>
    <style:style style:name="P67" style:family="paragraph" style:parent-style-name="Table_20_Contents">
      <style:text-properties officeooo:paragraph-rsid="0018d03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85a79" style:font-weight-asian="normal" style:font-weight-complex="normal"/>
    </style:style>
    <style:style style:name="T4" style:family="text">
      <style:text-properties officeooo:rsid="0034d21e"/>
    </style:style>
    <style:style style:name="T5" style:family="text">
      <style:text-properties fo:color="#355269" loext:opacity="100%" fo:font-weight="bold" style:font-weight-asian="bold" style:font-weight-complex="bold"/>
    </style:style>
    <style:style style:name="T6" style:family="text">
      <style:text-properties officeooo:rsid="002234dc"/>
    </style:style>
    <style:style style:name="T7" style:family="text">
      <style:text-properties officeooo:rsid="00262d49"/>
    </style:style>
    <style:style style:name="T8" style:family="text">
      <style:text-properties fo:font-weight="normal" officeooo:rsid="00262d49" style:font-weight-asian="normal" style:font-weight-complex="normal"/>
    </style:style>
    <style:style style:name="T9" style:family="text">
      <style:text-properties officeooo:rsid="00267ca1"/>
    </style:style>
    <style:style style:name="T10" style:family="text">
      <style:text-properties fo:font-weight="bold" officeooo:rsid="00267ca1" style:font-weight-asian="bold" style:font-weight-complex="bold"/>
    </style:style>
    <style:style style:name="T11" style:family="text">
      <style:text-properties fo:font-weight="bold" officeooo:rsid="0029eec2" style:font-weight-asian="bold" style:font-weight-complex="bold"/>
    </style:style>
    <style:style style:name="T12" style:family="text">
      <style:text-properties officeooo:rsid="00285a79"/>
    </style:style>
    <style:style style:name="T13" style:family="text">
      <style:text-properties fo:font-weight="normal" officeooo:rsid="002a88a9" style:font-weight-asian="normal" style:font-weight-complex="normal"/>
    </style:style>
    <style:style style:name="T14" style:family="text">
      <style:text-properties officeooo:rsid="002a88a9"/>
    </style:style>
    <style:style style:name="T15" style:family="text">
      <style:text-properties fo:font-weight="normal" officeooo:rsid="002b658e" style:font-weight-asian="normal" style:font-weight-complex="normal"/>
    </style:style>
    <style:style style:name="T16" style:family="text">
      <style:text-properties officeooo:rsid="0034f911"/>
    </style:style>
    <style:style style:name="T17" style:family="text">
      <style:text-properties officeooo:rsid="002d3dcb"/>
    </style:style>
    <style:style style:name="T18" style:family="text">
      <style:text-properties officeooo:rsid="003570a2"/>
    </style:style>
    <style:style style:name="T19" style:family="text">
      <style:text-properties officeooo:rsid="00361563"/>
    </style:style>
    <style:style style:name="T20" style:family="text">
      <style:text-properties fo:font-weight="bold" officeooo:rsid="002d3dcb" style:font-weight-asian="bold" style:font-weight-complex="bold"/>
    </style:style>
    <style:style style:name="T21" style:family="text">
      <style:text-properties fo:font-style="italic" fo:font-weight="bold" officeooo:rsid="002234dc"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officeooo:rsid="00351fb9"/>
    </style:style>
    <style:style style:name="T25" style:family="text">
      <style:text-properties fo:font-weight="normal" officeooo:rsid="00365465" style:font-weight-asian="normal" style:font-weight-complex="normal"/>
    </style:style>
    <style:style style:name="T26" style:family="text">
      <style:text-properties officeooo:rsid="00365465"/>
    </style:style>
    <style:style style:name="T27" style:family="text">
      <style:text-properties officeooo:rsid="003a1435"/>
    </style:style>
    <style:style style:name="T28" style:family="text">
      <style:text-properties officeooo:rsid="00150dcb"/>
    </style:style>
    <style:style style:name="fr1"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 Calculation Breakdown</text:p>
      <text:p text:style-name="P2"/>
      <text:p text:style-name="P3">The CONC system has two engines: a <text:span text:style-name="T1">Downtime Cost Calculator</text:span> (9 cost categories + 1 fine ceiling) and a <text:span text:style-name="T1">Breach Likelihood Calculator</text:span> (annual probability → ALE).</text:p>
      <text:p text:style-name="P3"/>
      <text:p text:style-name="P4">Methodology Overview</text:p>
      <text:p text:style-name="P3">The Cost of Non-Compliance (CoNC) model estimates the financial impact of a significant cyber incident across nine cost categories. Each category is calculated independently using organisation-specific inputs (revenue, sector, IT dependency, business orientation) and maturity scores derived from a CIS Controls v8 GAP assessment.</text:p>
      <text:p text:style-name="P3"/>
      <text:p text:style-name="P3">All estimates are presented as a three-point range (low / mid / high) with the low and high bounds set at ±30% of the mid-point estimate. This range reflects the inherent uncertainty in incident cost modelling and aligns with the calibrated estimation approach recommended by Hubbard (2016) and the FAIR standard.</text:p>
      <text:p text:style-name="P3"/>
      <text:p text:style-name="P3"><text:span text:style-name="T1">Primary Data Sources</text:span></text:p>
      <text:p text:style-name="P3">IBM / Ponemon Institute — Cost of a Data Breach Report (annual, published since 2006). The sector adjustment factors used in this model are calibrated from the industry-specific cost figures in IBM's dataset. This is the largest and most widely cited longitudinal study of breach costs, covering 6,000+ organisations across 16 countries. The 2024 report (covering 2023 incidents) reports a global average breach cost of $4.88M, with organisations under 500 employees averaging $3.31M — disproportionately high relative to revenue.</text:p>
      <text:p text:style-name="P3"/>
      <text:p text:style-name="P3">Hiscox Cyber Readiness Report (annual). Provides SME-specific cyber incident cost data across European markets, including median and mean costs by organisation size band. Particularly relevant for validating base cost tiers for organisations in the €10M–€250M revenue range.</text:p>
      <text:p text:style-name="P3"/>
      <text:p text:style-name="P3">ENISA Threat Landscape and ENISA Cybersecurity for SMEs (2021). Published by the EU Agency for Cybersecurity, these reports provide European-focused incident frequency data and SME-specific risk guidance. ENISA carries regulatory authority weight as the body advising on NIS2 implementation.</text:p>
      <text:p text:style-name="P3"/>
      <text:p text:style-name="P3">Verizon Data Breach Investigations Report (DBIR, annual). While primarily focused on attack patterns rather than costs, the DBIR provides authoritative data on incident frequency and vectors that inform the threat likelihood assumptions underlying this model.</text:p>
      <text:p text:style-name="P3"/>
      <text:p text:style-name="P4">Range Estimates (±30% Bands)</text:p>
      <text:p text:style-name="P3">All cost estimates are presented with low (−30%) and high (+30%) bounds around the mid-point. This is a deliberate modelling choice, not an expression of low confidence.</text:p>
      <text:p text:style-name="P3"/>
      <text:p text:style-name="P3">The FAIR standard and Hubbard (2016) both advocate for range estimates over point estimates in risk quantification. A ±30% band is conservative — real-world incident costs exhibit significantly higher variance. The band represents the range within which the cost is most likely to fall for a typical incident of the modelled severity, not the full distribution of possible outcomes.</text:p>
      <text:p text:style-name="P3"/>
      <text:p text:style-name="P3"><text:soft-page-break/>The mid-point should be interpreted as the expected value for a significant but not catastrophic incident. Tail-risk scenarios (e.g., extended ransomware with data exfiltration) may substantially exceed the high estimate.</text:p>
      <text:p text:style-name="P5"><text:span text:style-name="T1">Downtime Cost Calculator</text:span></text:p>
      <text:p text:style-name="P6"/>
      <text:p text:style-name="P7">1. <text:span text:style-name="T1">Operational Downtime Cost</text:span></text:p>
      <text:p text:style-name="P8"/>
      <text:p text:style-name="P9">Baseline</text:p>
      <text:p text:style-name="Parameter">Annual Revenue</text:p>
      <text:p text:style-name="P8"/>
      <text:p text:style-name="P10">Intermediate 1<text:span text:style-name="T2"> – </text:span><text:span text:style-name="T3">Daily Revenue</text:span></text:p>
      <text:p text:style-name="P11">Daily Revenue for breaking downtime <text:span text:style-name="T4">costs into </text:span>cost per day.</text:p>
      <text:p text:style-name="P11"/>
      <text:p text:style-name="P12">Formula:</text:p>
      <text:p text:style-name="Parameter">Daily revenue = <text:span text:style-name="T5">Annual Revenue</text:span><text:span text:style-name="T2"> / </text:span><text:span text:style-name="T1">Business Days Per Year</text:span><text:span text:style-name="T2">.</text:span></text:p>
      <text:p text:style-name="P11"/>
      <text:p text:style-name="P12">Data source:</text:p>
      <text:p text:style-name="P11">Both parameters are from <text:span text:style-name="T6">Organization : Geography &amp; Revenue.</text:span></text:p>
      <text:p text:style-name="P11"/>
      <text:p text:style-name="P13">Intermediate 2<text:span text:style-name="T2"> - <text:s/></text:span><text:span text:style-name="T3">IT dependency</text:span></text:p>
      <text:p text:style-name="P11">Adjust downtime cost by the IT dependency ratio. The higher dependency, the higher cost.</text:p>
      <text:p text:style-name="P11"/>
      <text:p text:style-name="P11">IT dependency is assessed across three dimensions: manual operation capability (can the business operate without IT?), production dependency on IT systems, and customer access dependency. Each dimension scores 0–2, producing an aggregate score of 0–6 that maps to Low (0–1), Medium (2–3), or High (4–6) dependency levels.</text:p>
      <text:p text:style-name="P11"/>
      <text:p text:style-name="P11">The IT dependency level drives two effects. First, it determines the IT Factor (30%, 60%, or 90%), which represents the proportion of daily revenue at risk during a system outage. Second, it provides a multiplier on IR, Restore, and EBI costs, reflecting that highly IT-dependent organisations face proportionally higher incident handling and recovery costs.</text:p>
      <text:p text:style-name="P11"/>
      <text:p text:style-name="P12">Formula:</text:p>
      <text:p text:style-name="P14"><draw:frame draw:style-name="fr1" draw:name="Frame3" text:anchor-type="as-char" draw:z-index="0"><draw:text-box fo:min-height="0in" fo:min-width="0in"><text:p text:style-name="P15">IT Dependency</text:p></draw:text-box></draw:frame><text:s/>= sum of</text:p>
      <text:p text:style-name="Parameter"><text:tab/>Manual Operation (0-2) +</text:p>
      <text:p text:style-name="Parameter"><text:tab/>Production Dependency (0-2) +</text:p>
      <text:p text:style-name="Parameter"><text:tab/>Customer Access (0-2)</text:p>
      <text:p text:style-name="Parameter">→ mapped to IT Factor (Low=0.30, Medium=0.60, High=0.90)</text:p>
      <text:p text:style-name="P14"/>
      <text:p text:style-name="P12">Data source:</text:p>
      <text:p text:style-name="P16">All three parameters are from <text:span text:style-name="T6">Organization : Business Continuity.</text:span></text:p>
      <text:p text:style-name="P8"/>
      <text:p text:style-name="P17">Intermediate <text:span text:style-name="T7">3</text:span><text:span text:style-name="T8"> – </text:span><text:span text:style-name="T3">Sector Factor</text:span></text:p>
      <text:p text:style-name="P11">The industry impact on downtime costs. Some industries have higher cost exposure than others.</text:p>
      <text:p text:style-name="P11"/>
      <text:p text:style-name="P11">Each organisation's NACE section code is mapped to an IBM industry classification, which determines a sector-specific cost factor. These factors range from 0.90 (Public sector) to 1.10 (Healthcare), normalised around 1.0. The narrow range reflects that while sector influences breach costs significantly in absolute terms, much of that variation is already captured by revenue-based scaling. The sector factor captures the residual effect — for example, Healthcare's higher factor reflects elevated regulatory scrutiny, data sensitivity, and operational criticality.</text:p>
      <text:p text:style-name="P11"/>
      <text:p text:style-name="P12">Formula:</text:p>
      <text:p text:style-name="Parameter"><draw:frame draw:style-name="fr1" draw:name="Frame4" text:anchor-type="as-char" draw:z-index="1"><draw:text-box fo:min-height="0in" fo:min-width="0in"><text:p text:style-name="P15">Sector Factor</text:p></draw:text-box></draw:frame><text:s/>= NACE → IBM mapping (0.9–1.1)</text:p>
      <text:p text:style-name="P18"><text:soft-page-break/></text:p>
      <text:p text:style-name="P12">Data source:</text:p>
      <text:p text:style-name="P19">NACE classification <text:span text:style-name="T9">is </text:span>used across EU for statistics and regulations. <text:span text:style-name="T9">It is stored on Organization : Sector &amp; Regulatory.</text:span></text:p>
      <text:p text:style-name="P19"/>
      <text:p text:style-name="P18">NACE to IBM mapping table:</text:p>
      <text:p text:style-name="P20"/>
      <text:p text:style-name="P21"><text:span text:style-name="T1"><text:tab/>EU Sector</text:span> <text:span text:style-name="T10">(NACE)</text:span> <text:s text:c="17"/><text:tab/><text:span text:style-name="T1">IBM Industry<text:tab/></text:span><text:span text:style-name="T11">Sector Factor</text:span></text:p>
      <text:p text:style-name="P22"><text:tab/>A – Agriculture <text:s text:c="12"/><text:tab/><text:tab/>Industrial<text:tab/><text:tab/>0.993859649122807</text:p>
      <text:p text:style-name="P22"><text:tab/>B – Mining <text:s text:c="17"/><text:tab/><text:tab/><text:tab/>Industrial<text:tab/><text:tab/>0.993859649122807</text:p>
      <text:p text:style-name="P21"><text:s text:c="11"/><text:tab/>C – Manufacturing <text:s text:c="10"/><text:tab/><text:tab/>Industrial<text:tab/><text:tab/>0.993859649122807</text:p>
      <text:p text:style-name="P21"><text:s text:c="11"/><text:tab/>D – Energy/Utilities <text:s text:c="7"/><text:tab/><text:tab/>Energy<text:tab/><text:tab/>0.98640350877193</text:p>
      <text:p text:style-name="P21"><text:s text:c="10"/><text:tab/>E – Water/Waste <text:s text:c="12"/><text:tab/><text:tab/>Energy<text:tab/><text:tab/>0.98640350877193</text:p>
      <text:p text:style-name="P23"><text:s text:c="11"/><text:tab/>F – Construction <text:s text:c="11"/><text:tab/><text:tab/>Industrial<text:tab/><text:tab/>0.993859649122807</text:p>
      <text:p text:style-name="P21"><text:s text:c="11"/><text:tab/>G – Wholesale/Retail <text:s text:c="7"/><text:tab/><text:tab/>Retail<text:tab/><text:tab/><text:tab/>0.929824561403509</text:p>
      <text:p text:style-name="P21"><text:s text:c="7"/><text:tab/>H – Transportation <text:s text:c="9"/><text:tab/><text:tab/>Transportation<text:tab/>0.949122807017544</text:p>
      <text:p text:style-name="P21"><text:s text:c="5"/><text:tab/>I – Hospitality <text:s text:c="12"/><text:tab/><text:tab/>Hospitality<text:tab/><text:tab/>0.951315789473684</text:p>
      <text:p text:style-name="P21"><text:s text:c="5"/><text:tab/>J – IT/Telecom <text:s text:c="13"/><text:tab/><text:tab/>Technology<text:tab/><text:tab/>0.984649122807018</text:p>
      <text:p text:style-name="P21"><text:s text:c="9"/><text:tab/>K – Financial Services <text:s text:c="5"/><text:tab/><text:tab/>Financial<text:tab/><text:tab/>1.01842105263158</text:p>
      <text:p text:style-name="P21"><text:s text:c="4"/><text:tab/>L – Real Estate <text:s text:c="12"/><text:tab/><text:tab/>Services<text:tab/><text:tab/>0.974561403508772</text:p>
      <text:p text:style-name="P21"><text:s text:c="4"/><text:tab/>M – Professional Services <text:s text:c="2"/><text:tab/>Services<text:tab/><text:tab/>0.974561403508772</text:p>
      <text:p text:style-name="P21"><text:s text:c="5"/><text:tab/>N – Administrative Services <text:tab/>Services<text:tab/><text:tab/>0.974561403508772</text:p>
      <text:p text:style-name="P21"><text:s text:c="4"/><text:tab/>O – Public Administration <text:s text:c="2"/><text:tab/>Public<text:tab/><text:tab/><text:tab/>0.9</text:p>
      <text:p text:style-name="P21"><text:s text:c="6"/><text:tab/>P – Education <text:s text:c="14"/><text:tab/><text:tab/>Education<text:tab/><text:tab/>0.941228070175439</text:p>
      <text:p text:style-name="P21"><text:s text:c="4"/><text:tab/>Q – Healthcare <text:s text:c="13"/><text:tab/><text:tab/>Healthcare<text:tab/><text:tab/>1.1</text:p>
      <text:p text:style-name="P21"><text:s text:c="2"/><text:tab/>R – Entertainment <text:s text:c="10"/><text:tab/><text:tab/>Entertainment<text:tab/>0.968859649122807</text:p>
      <text:p text:style-name="P23"><text:tab/>S – Other Services <text:s text:c="9"/><text:tab/><text:tab/>Services<text:tab/><text:tab/>0.974561403508772</text:p>
      <text:p text:style-name="P7"/>
      <text:p text:style-name="P24">Other IBM Sectors that are not currently mapped:</text:p>
      <text:p text:style-name="P24">Pharmaceuticals<text:tab/>:<text:tab/>0.976754385964912</text:p>
      <text:p text:style-name="P24">Media<text:tab/><text:tab/><text:tab/>: <text:tab/>0.959649122807018</text:p>
      <text:p text:style-name="P24">Research<text:tab/><text:tab/>: <text:s text:c="6"/><text:tab/>0.940789473684211</text:p>
      <text:p text:style-name="P24">Communications<text:tab/>: <text:tab/>0.939035087719298</text:p>
      <text:p text:style-name="P24">Consumer<text:tab/><text:tab/>: <text:s text:c="6"/><text:tab/>0.937719298245614</text:p>
      <text:p text:style-name="P7"/>
      <text:p text:style-name="P13">Intermediate <text:span text:style-name="T12">4</text:span><text:span text:style-name="T3"> – </text:span><text:span text:style-name="T13">Organization Size</text:span></text:p>
      <text:p text:style-name="P25">Organisation size (EU SME Classification per Commission Recommendation 2003/361/EC) is used as a complexity multiplier on the adjusted daily loss. Two organisations with identical revenue but different workforce sizes experience different incident impacts: a larger organisation has more systems to coordinate, more people idled during downtime, and greater operational overhead during recovery.</text:p>
      <text:p text:style-name="P25"/>
      <text:p text:style-name="P25">The multipliers are: Micro (0–9 employees): 0.90×, Small (10–49): 0.95×, Medium (50–249): 1.00× (baseline), Large (250–999): 1.10×, Enterprise (1000+): 1.15×. These are deliberately mild — revenue remains the primary cost driver, with size acting as a secondary adjustment for organisational complexity.</text:p>
      <text:p text:style-name="P26"/>
      <text:p text:style-name="P27">Formula:</text:p>
      <text:p text:style-name="P26">Micro<text:tab/><text:tab/>: <text:s/>0.90 - fewer systems, less coordination overhead</text:p>
      <text:p text:style-name="P26">Small<text:tab/><text:tab/>: 0.95</text:p>
      <text:p text:style-name="P26">Medium<text:tab/>: 1.00 - baseline</text:p>
      <text:p text:style-name="P26">Large<text:tab/><text:tab/>: <text:s/>1.10 - more complexity, more people affected</text:p>
      <text:p text:style-name="P26">Enterprise<text:tab/>: <text:s/>1.15 - complex, dedicated teams offset by scope</text:p>
      <text:p text:style-name="P26"/>
      <text:p text:style-name="P27"><text:soft-page-break/>Data source:</text:p>
      <text:p text:style-name="P26">Organizations are classified into one of five categories:</text:p>
      <text:p text:style-name="P26">Micro<text:tab/><text:tab/>: <text:s/>0–9 employees</text:p>
      <text:p text:style-name="P26">Small<text:tab/><text:tab/>: 10–49 employees</text:p>
      <text:p text:style-name="P26">Medium<text:tab/>: 50–249 employees</text:p>
      <text:p text:style-name="P26">Large<text:tab/><text:tab/>: <text:s/>250–999 employees</text:p>
      <text:p text:style-name="P26">Enterprise<text:tab/>: <text:s/>1000+ employees</text:p>
      <text:p text:style-name="P26"/>
      <text:p text:style-name="P26">The organization size is stored under the category: Size &amp; Maturity.</text:p>
      <text:p text:style-name="P7"/>
      <text:p text:style-name="P28">Intermediate <text:span text:style-name="T14">5</text:span><text:span text:style-name="T13"> – Adjusted daily loss</text:span></text:p>
      <text:p text:style-name="P26">Adjusting baseline loss by intermediates 1-4.</text:p>
      <text:p text:style-name="P25"/>
      <text:p text:style-name="P27">Formula:</text:p>
      <text:p text:style-name="P29"><text:span text:style-name="T14">Adjusted Daily Loss</text:span> = </text:p>
      <text:p text:style-name="P30"><text:tab/>Daily Revenue × </text:p>
      <text:p text:style-name="P30"><text:tab/>IT Factor × </text:p>
      <text:p text:style-name="P30"><text:tab/>Sector Factor × </text:p>
      <text:p text:style-name="P30"><text:tab/>Organization Size Multiplier</text:p>
      <text:p text:style-name="P28"/>
      <text:p text:style-name="P31">Intermediate <text:span text:style-name="T14">6 </text:span><text:span text:style-name="T13">– </text:span><text:span text:style-name="T15">Downtime GAP Score</text:span></text:p>
      <text:p text:style-name="P32">The <text:span text:style-name="T16">Downtime GAP score </text:span>is <text:span text:style-name="T16">calculated</text:span> by <text:span text:style-name="T16">adding up the </text:span><text:span text:style-name="T17">CIS </text:span>Control/Safeguard implementation status <text:span text:style-name="T16">(CMMI) across eight relevant Safeguards</text:span>.</text:p>
      <text:p text:style-name="P33"/>
      <text:p text:style-name="P34">Formula:</text:p>
      <text:p text:style-name="P35"><draw:frame draw:style-name="fr1" draw:name="Frame1" text:anchor-type="as-char" draw:z-index="2"><draw:text-box fo:min-height="0in" fo:min-width="0in"><text:p text:style-name="P15">Downtime GAP Score</text:p></draw:text-box></draw:frame><text:s/>= </text:p>
      <text:p text:style-name="P35"><text:span text:style-name="T18"><text:tab/>AVERAGE</text:span> (Safeguard 8.11, 11.1, 11.2, 11.4, 11.5, 17.1, 17.2, 17.5)</text:p>
      <text:p text:style-name="P36"><text:tab/>-<text:span text:style-name="T18">1</text:span><text:tab/></text:p>
      <text:p text:style-name="P36"><text:tab/>/<text:span text:style-name="T18">4</text:span></text:p>
      <text:p text:style-name="P35"><text:tab/>×<text:span text:style-name="T18"> 100</text:span></text:p>
      <text:p text:style-name="P36"/>
      <text:p text:style-name="P34">Data source:</text:p>
      <text:p text:style-name="P37">These GAP CMMI values are used <text:span text:style-name="T19">(if not defined, default to CMMI=1)</text:span>:</text:p>
      <text:p text:style-name="P37"/>
      <text:p text:style-name="P37"><text:tab/><text:span text:style-name="T20">Item</text:span><text:span text:style-name="T17"><text:tab/><text:tab/><text:tab/><text:tab/><text:tab/><text:tab/></text:span><text:span text:style-name="T20">CIS Safeguard</text:span></text:p>
      <text:p text:style-name="P37"><text:tab/>Daily Backups<text:tab/><text:tab/><text:tab/><text:tab/>11.2 — Perform Automated Backups</text:p>
      <text:p text:style-name="P37"><text:tab/>Offsite / Immutable Backups<text:tab/><text:tab/>11.4 — Establish and Maintain an Isolated</text:p>
      <text:p text:style-name="P37"><text:tab/><text:tab/><text:tab/><text:tab/><text:tab/><text:tab/><text:tab/><text:tab/>Instance of Recovery Data</text:p>
      <text:p text:style-name="P37"><text:tab/>Restore Testing<text:tab/><text:tab/><text:tab/><text:tab/>11.5 — Test Data Recovery</text:p>
      <text:p text:style-name="P33"><text:tab/>Incident Response Plan<text:tab/><text:tab/><text:tab/>17.2 — Establish and Maintain Incident</text:p>
      <text:p text:style-name="P33"><text:tab/><text:tab/><text:tab/><text:tab/><text:tab/><text:tab/><text:tab/><text:tab/>Response Process</text:p>
      <text:p text:style-name="P33"><text:tab/>Defined Roles<text:tab/><text:tab/><text:tab/><text:tab/>17.1 — Designate Personnel to Manage</text:p>
      <text:p text:style-name="P33"><text:tab/><text:tab/><text:tab/><text:tab/><text:tab/><text:tab/><text:tab/><text:tab/>Incident Handling</text:p>
      <text:p text:style-name="P33"><text:tab/>Incident Exercises<text:tab/><text:tab/><text:tab/><text:tab/>17.5 — Test Incident Response</text:p>
      <text:p text:style-name="P33"><text:tab/>Infrastructure Resilience<text:tab/><text:tab/><text:tab/>11.1 — Establish and Maintain a Data</text:p>
      <text:p text:style-name="P33"><text:tab/><text:tab/><text:tab/><text:tab/><text:tab/><text:tab/><text:tab/><text:tab/>Recovery Process (closest match</text:p>
      <text:p text:style-name="P33"><text:tab/><text:tab/><text:tab/><text:tab/><text:tab/><text:tab/><text:tab/><text:tab/>under Control 11)</text:p>
      <text:p text:style-name="P33"><text:tab/>Monitoring<text:tab/><text:tab/><text:tab/><text:tab/><text:tab/>8.11 — Conduct Audit Log Reviews (or 8.2</text:p>
      <text:p text:style-name="P33"><text:tab/><text:tab/><text:tab/><text:tab/><text:tab/><text:tab/><text:tab/><text:tab/>Collect Audit Logs, depending on</text:p>
      <text:p text:style-name="P33"><text:tab/><text:tab/><text:tab/><text:tab/><text:tab/><text:tab/><text:tab/><text:tab/>scope)</text:p>
      <text:p text:style-name="P33"/>
      <text:p text:style-name="P33"><text:span text:style-name="T21">Intermediate </text:span><text:span text:style-name="T22">6 </text:span><text:span text:style-name="T23">– </text:span>Downtime Days</text:p>
      <text:p text:style-name="P38">The temporal length of a downtime event is <text:span text:style-name="T17">estimated</text:span> by <text:span text:style-name="T24">using </text:span>the <text:span text:style-name="T16">Downtime </text:span>GAP score. <text:span text:style-name="T24">Resulting in a </text:span><text:span text:style-name="T14">1.0–5.0 range.</text:span></text:p>
      <text:p text:style-name="P37"><text:soft-page-break/></text:p>
      <text:p text:style-name="P39">Example, the higher extreme end, GAP = 0 (CMMI 1 across all relevant safeguards), this gives a Downtime GAP score of 5.0 days — realistic for ransomware at an unprepared SME.</text:p>
      <text:p text:style-name="P39"/>
      <text:p text:style-name="P39">Whereas on the other extreme, GAP = 100 (CMMI 1 across all relevant safeguards), this gives a Downtime GAP score of 1.0 days — minimum for a significant incident.</text:p>
      <text:p text:style-name="P39"/>
      <text:p text:style-name="P39">And with ±30% band: effective range is 0.7–6.5 days</text:p>
      <text:p text:style-name="P37"/>
      <text:p text:style-name="P40">Formula:</text:p>
      <text:p text:style-name="P41">Downtime Days = <text:span text:style-name="T24">5</text:span>.0 - (Downtime GAP Score / 100) × 4.0</text:p>
      <text:p text:style-name="P39"/>
      <text:p text:style-name="P42"><text:span text:style-name="T1">FINAL</text:span><text:span text:style-name="T2"> –</text:span><text:span text:style-name="T25"> Operational Downtime Loss</text:span></text:p>
      <text:p text:style-name="P40">Formula:</text:p>
      <text:p text:style-name="P43">Adjusted Daily Loss <text:span text:style-name="T16">× </text:span>Downtime Days (±30% band, <text:span text:style-name="T26">for Low/High</text:span>) </text:p>
      <text:p text:style-name="P25"/>
      <text:p text:style-name="P44">2. <text:span text:style-name="T1">Incident Response &amp; Forensics</text:span></text:p>
      <text:p text:style-name="P45"/>
      <text:p text:style-name="P46">Baseline</text:p>
      <text:p text:style-name="P47"><text:span text:style-name="T27">P</text:span>iecewise interpolation from revenue anchors (€500K→€3M)</text:p>
      <text:p text:style-name="P47"/>
      <text:p text:style-name="P48"/>
      <text:p text:style-name="P49">Intermediate 1</text:p>
      <text:p text:style-name="P50"/>
      <text:p text:style-name="P50"/>
      <text:p text:style-name="P51">Formula:</text:p>
      <text:p text:style-name="P52"><text:span text:style-name="T2"/></text:p>
      <text:p text:style-name="P50"/>
      <text:p text:style-name="P51">Data source:</text:p>
      <text:p text:style-name="P50"/>
      <text:p text:style-name="P50"/>
      <text:p text:style-name="P45"/>
      <text:p text:style-name="P53">- Base = piecewise interpolation from revenue anchors (€500K→€3M)</text:p>
      <text:p text:style-name="P53">- IR Score = avg CMMI of ['17.2','17.1','17.5','8.11']</text:p>
      <text:p text:style-name="P53">- IR Maturity Mult = 1.3 - ((irScore-1)/4) × 0.5 (range 1.3× to 0.8×)</text:p>
      <text:p text:style-name="P53">- IT Dep Mult = Low 0.85×, Medium 1.0×, High 1.15×</text:p>
      <text:p text:style-name="P53">- Result = base × irMaturityMult × itDepMult</text:p>
      <text:p text:style-name="P53"/>
      <text:p text:style-name="P54">References</text:p>
      <text:p text:style-name="P53">• IBM Security / Ponemon Institute. Cost of a Data Breach Report 2024. IBM Corporation.</text:p>
      <text:p text:style-name="P53"/>
      <text:p text:style-name="P53">• Hiscox. Cyber Readiness Report 2024. Hiscox Ltd.</text:p>
      <text:p text:style-name="P53"/>
      <text:p text:style-name="P53">• ENISA. Threat Landscape 2024. European Union Agency for Cybersecurity.</text:p>
      <text:p text:style-name="P53"/>
      <text:p text:style-name="P53">• ENISA. Cybersecurity for SMEs. 2021. European Union Agency for Cybersecurity.</text:p>
      <text:p text:style-name="P53"/>
      <text:p text:style-name="P53">• Verizon. 2024 Data Breach Investigations Report. Verizon Business.</text:p>
      <text:p text:style-name="P53"/>
      <text:p text:style-name="P53">• The Open Group. Open FAIR™ Risk Analysis (O-RA) Standard. The Open Group.</text:p>
      <text:p text:style-name="P53"/>
      <text:p text:style-name="P53">• CIS. CIS Controls v8. Center for Internet Security, Inc.</text:p>
      <text:p text:style-name="P53"/>
      <text:p text:style-name="P53">• CIS. CIS Risk Assessment Method (CIS RAM) v2.1. Center for Internet Security, Inc.</text:p>
      <text:p text:style-name="P53"/>
      <text:p text:style-name="P53">• Gordon, L.A. &amp; Loeb, M.P. (2002). The Economics of Information Security Investment. ACM Transactions on Information and System Security, 5(4), 438–457.</text:p>
      <text:p text:style-name="P53"/>
      <text:p text:style-name="P53">• Hubbard, D.W. &amp; Seiersen, R. (2016). How to Measure Anything in Cybersecurity Risk. Wiley.</text:p>
      <text:p text:style-name="P53"/>
      <text:p text:style-name="P53">• ISO/IEC 27005:2022. Information Security Risk Management. International Organization for Standardization.</text:p>
      <text:p text:style-name="P53"/>
      <text:p text:style-name="P53">• NIST SP 800-30 Rev. 1. Guide for Conducting Risk Assessments. National Institute of Standards and Technology.</text:p>
      <text:p text:style-name="P53"/>
      <text:p text:style-name="P53">• Directive (EU) 2022/2555 (NIS2). European Parliament and Council.</text:p>
      <text:p text:style-name="P53"/>
      <text:p text:style-name="P53">• Regulation (EU) 2016/679 (GDPR). European Parliament and Council.</text:p>
      <text:p text:style-name="P53"/>
      <text:p text:style-name="P44"/>
      <text:p text:style-name="P53"/>
      <text:p text:style-name="P53"/>
      <text:p text:style-name="P53">3. <text:span text:style-name="T1">System Restoration &amp; Rebuild</text:span></text:p>
      <text:p text:style-name="P53">- Base = interpolated from revenue anchors (€400K→€2.5M)</text:p>
      <text:p text:style-name="P53">- Restore Score = avg CMMI of ['11.2','11.4','11.5']</text:p>
      <text:p text:style-name="P53">- Restore Maturity Mult = 1.4 - ((score-1)/4) × 0.7 (range 1.4× to 0.7×)</text:p>
      <text:p text:style-name="P53">- Infra Mult = highest from infrastructureTypes[]: CLOUD_ONLY 0.75, MULTI_CLOUD 0.85, HYBRID 1.00, ON_PREM 1.20, OT 1.35</text:p>
      <text:p text:style-name="P53">- Result = base × restoreMult × itDepMult × infraMult</text:p>
      <text:p text:style-name="P53"/>
      <text:p text:style-name="P53">4. <text:span text:style-name="T1">Extended Business Interruption (EBI)</text:span></text:p>
      <text:p text:style-name="P53">- Friction = 0.15 × downtimeDays² (quadratic — cascading impact)</text:p>
      <text:p text:style-name="P55">- Result = dailyRevenue × friction × sectorAdj × depMult × restoreAdj</text:p>
      <text:p text:style-name="P55"/>
      <text:p text:style-name="P55">5. <text:span text:style-name="T1">Customer &amp; Contract Loss (CCL)</text:span></text:p>
      <text:p text:style-name="P55">- Base % by customer model (B2B/B2C) × revenue concentration (LOW/MEDIUM/HIGH): B2B 0.2–0.8%, B2C 0.3–1.2%</text:p>
      <text:p text:style-name="P55">- Severity Adj = linear from downtime days (0.8× to 1.2×)</text:p>
      <text:p text:style-name="P55">- Result = annualRevenue × basePct × sectorAdj × severityAdj × irAdj</text:p>
      <text:p text:style-name="P55"/>
      <text:p text:style-name="P55">6. <text:span text:style-name="T1">Regulatory &amp; Supervisory</text:span></text:p>
      <text:p text:style-name="P55">- Base = interpolated (€250K→€1.8M)</text:p>
      <text:p text:style-name="P55"/>
      <text:p text:style-name="P56">- Framework Mult = 1.0 + (frameworkCount - 1) × 0.25 (e.g., GDPR+NIS2+DORA = 1.50×)</text:p>
      <text:p text:style-name="P56">- Geo Mult = LOCAL/REGIONAL/NATIONAL 1.0, EUROPEAN 1.20, GLOBAL 1.35</text:p>
      <text:p text:style-name="P56">- Previous Breach = NONE 1.0, ONE 1.25, MULTIPLE 1.50</text:p>
      <text:p text:style-name="P57">- Result = base × sectorAdj × severityAdj × irAdj × frameworkMult × geoMult × breachMult</text:p>
      <text:p text:style-name="P57"/>
      <text:p text:style-name="P57">7. <text:span text:style-name="T1">Reputational Impact</text:span></text:p>
      <text:p text:style-name="P56">- Base % = B2B 0.15%, B2C 0.40% of annual revenue</text:p>
      <text:p text:style-name="P56">- Visibility Mult = B2C 1.5×, B2B 1.0×</text:p>
      <text:p text:style-name="P56">- Data Sensitivity Mult = highest from dataSensitivity[]: BASIC 0.80 → SPECIAL_CATEGORY/CLASSIFIED 1.50</text:p>
      <text:p text:style-name="P56">- Previous Breach = NONE 1.0, ONE 1.20, MULTIPLE 1.40</text:p>
      <text:p text:style-name="P56">- Result = revenue × basePct × severityAdj × sectorAdj × irAdj × visibilityMult × dataSensMult × breachMult</text:p>
      <text:p text:style-name="P56"/>
      <text:p text:style-name="P56">8. <text:span text:style-name="T1">Management &amp; Governance</text:span></text:p>
      <text:p text:style-name="P56">- Base = interpolated (€150K→€900K)</text:p>
      <text:p text:style-name="P56">- Result = base × severityAdj × sectorAdj (simplest category)</text:p>
      <text:p text:style-name="P56"/>
      <text:p text:style-name="P56">9. <text:span text:style-name="T1">Notification Costs</text:span></text:p>
      <text:p text:style-name="P56">- Base = interpolated (€100K→€800K)</text:p>
      <text:p text:style-name="P56">- Data Sensitivity Mult = highest: IP 0.50 → SPECIAL_CATEGORY 1.60</text:p>
      <text:p text:style-name="P56">- Result = base × dataSensMult × orgSizeMult × geoMult × frameworkMult</text:p>
      <text:p text:style-name="P56"/>
      <text:p text:style-name="P56">10. <text:span text:style-name="T1">Administrative Fine Ceiling (excluded from total)</text:span></text:p>
      <text:p text:style-name="P56">- IMPORTANT = max(1.4% of revenue, €7M)</text:p>
      <text:p text:style-name="P56">- ESSENTIAL = max(2.0% of revenue, €10M)</text:p>
      <text:p text:style-name="P58">Breach Likelihood Calculator</text:p>
      <text:p text:style-name="P59"/>
      <table:table table:name="Table1" table:style-name="Table1">
        <table:table-column table:style-name="Table1.A" table:number-columns-repeated="3"/>
        <table:table-row>
          <table:table-cell table:style-name="Table1.A1" office:value-type="string">
            <text:p text:style-name="Table_20_Contents">Factor</text:p>
          </table:table-cell>
          <table:table-cell table:style-name="Table1.A1" office:value-type="string">
            <text:p text:style-name="Table_20_Contents">Source</text:p>
          </table:table-cell>
          <table:table-cell table:style-name="Table1.A1" office:value-type="string">
            <text:p text:style-name="Table_20_Contents">Beta Range</text:p>
          </table:table-cell>
        </table:table-row>
        <table:table-row>
          <table:table-cell table:style-name="Table1.A1" office:value-type="string">
            <text:p text:style-name="Table_20_Contents">Base rate</text:p>
          </table:table-cell>
          <table:table-cell table:style-name="Table1.A1" office:value-type="string">
            <text:p text:style-name="Table_20_Contents">orgSize</text:p>
          </table:table-cell>
          <table:table-cell table:style-name="Table1.A1" office:value-type="string">
            <text:p text:style-name="Table_20_Contents">6% (MICRO) – 33% (ENTERPRISE)</text:p>
          </table:table-cell>
        </table:table-row>
        <table:table-row>
          <table:table-cell table:style-name="Table1.A1" office:value-type="string">
            <text:p text:style-name="Table_20_Contents">Industry</text:p>
          </table:table-cell>
          <table:table-cell table:style-name="Table1.A1" office:value-type="string">
            <text:p text:style-name="Table_20_Contents">naceSection→IBM</text:p>
          </table:table-cell>
          <table:table-cell table:style-name="Table1.A1" office:value-type="string">
            <text:p text:style-name="Table_20_Contents">-0.10 to +0.40</text:p>
          </table:table-cell>
        </table:table-row>
        <table:table-row>
          <table:table-cell table:style-name="Table1.A1" office:value-type="string">
            <text:p text:style-name="Table_20_Contents">CIS Preventive (45%)</text:p>
          </table:table-cell>
          <table:table-cell table:style-name="Table1.A1" office:value-type="string">
            <text:p text:style-name="Table_20_Contents">15 safeguard CMMIs</text:p>
          </table:table-cell>
          <table:table-cell table:style-name="Table1.A1" office:value-type="string">
            <text:p text:style-name="Table_20_Contents">0 to -0.36</text:p>
          </table:table-cell>
        </table:table-row>
        <table:table-row>
          <table:table-cell table:style-name="Table1.A1" office:value-type="string">
            <text:p text:style-name="Table_20_Contents">CIS Detective (35%)</text:p>
          </table:table-cell>
          <table:table-cell table:style-name="Table1.A1" office:value-type="string">
            <text:p text:style-name="Table_20_Contents">7 safeguard CMMIs</text:p>
          </table:table-cell>
          <table:table-cell table:style-name="Table1.A1" office:value-type="string">
            <text:p text:style-name="Table_20_Contents">0 to -0.28</text:p>
          </table:table-cell>
        </table:table-row>
        <table:table-row>
          <table:table-cell table:style-name="Table1.A1" office:value-type="string">
            <text:p text:style-name="Table_20_Contents">CIS Data Protection (20%)</text:p>
          </table:table-cell>
          <table:table-cell table:style-name="Table1.A1" office:value-type="string">
            <text:p text:style-name="Table_20_Contents">8 safeguard CMMIs</text:p>
          </table:table-cell>
          <table:table-cell table:style-name="Table1.A1" office:value-type="string">
            <text:p text:style-name="Table_20_Contents">0 to -0.16</text:p>
          </table:table-cell>
        </table:table-row>
        <table:table-row table:style-name="Table1.7">
          <table:table-cell table:style-name="Table1.A1" office:value-type="string">
            <text:p text:style-name="Table_20_Contents">Data Attractiveness</text:p>
          </table:table-cell>
          <table:table-cell table:style-name="Table1.A1" office:value-type="string">
            <text:p text:style-name="Table_20_Contents">dataSensitivity (max)</text:p>
          </table:table-cell>
          <table:table-cell table:style-name="Table1.A1" office:value-type="string">
            <text:p text:style-name="Table_20_Contents">-0.15 to +0.25</text:p>
          </table:table-cell>
        </table:table-row>
        <table:table-row table:style-name="Table1.8">
          <table:table-cell table:style-name="Table1.A1" office:value-type="string">
            <text:p text:style-name="Table_20_Contents">Infra Exposure</text:p>
          </table:table-cell>
          <table:table-cell table:style-name="Table1.A1" office:value-type="string">
            <text:p text:style-name="Table_20_Contents">infrastructureTypes (max)</text:p>
          </table:table-cell>
          <table:table-cell table:style-name="Table1.A1" office:value-type="string">
            <text:p text:style-name="Table_20_Contents">-0.10 to +0.20</text:p>
          </table:table-cell>
        </table:table-row>
        <table:table-row>
          <table:table-cell table:style-name="Table1.A1" office:value-type="string">
            <text:p text:style-name="Table_20_Contents">Geographic</text:p>
          </table:table-cell>
          <table:table-cell table:style-name="Table1.A1" office:value-type="string">
            <text:p text:style-name="Table_20_Contents">geographicScope</text:p>
          </table:table-cell>
          <table:table-cell table:style-name="Table1.A1" office:value-type="string">
            <text:p text:style-name="Table_20_Contents">-0.10 to +0.<text:span text:style-name="T28">1</text:span>0</text:p>
          </table:table-cell>
        </table:table-row>
        <table:table-row>
          <table:table-cell table:style-name="Table1.A1" office:value-type="string">
            <text:p text:style-name="Table_20_Contents">Security Staffing</text:p>
          </table:table-cell>
          <table:table-cell table:style-name="Table1.A1" office:value-type="string">
            <text:p text:style-name="Table_20_Contents">itSecurityStaff</text:p>
          </table:table-cell>
          <table:table-cell table:style-name="Table1.A1" office:value-type="string">
            <text:p text:style-name="Table_20_Contents">-0.1<text:span text:style-name="T28">5</text:span> to +0.20</text:p>
          </table:table-cell>
        </table:table-row>
        <table:table-row>
          <table:table-cell table:style-name="Table1.A1" office:value-type="string">
            <text:p text:style-name="Table_20_Contents">Security Maturity</text:p>
          </table:table-cell>
          <table:table-cell table:style-name="Table1.A1" office:value-type="string">
            <text:p text:style-name="Table_20_Contents">securityMaturity</text:p>
          </table:table-cell>
          <table:table-cell table:style-name="Table1.A1" office:value-type="string">
            <text:p text:style-name="Table_20_Contents">-0.<text:span text:style-name="T28">2</text:span>0 to +0.2<text:span text:style-name="T28">5</text:span></text:p>
          </table:table-cell>
        </table:table-row>
        <table:table-row>
          <table:table-cell table:style-name="Table1.A1" office:value-type="string">
            <text:p text:style-name="Table_20_Contents">Public Services</text:p>
          </table:table-cell>
          <table:table-cell table:style-name="Table1.A1" office:value-type="string">
            <text:p text:style-name="Table_20_Contents">publicFacingServices</text:p>
          </table:table-cell>
          <table:table-cell table:style-name="Table1.A1" office:value-type="string">
            <text:p text:style-name="Table_20_Contents">-0.10 to +0.20</text:p>
          </table:table-cell>
        </table:table-row>
        <table:table-row>
          <table:table-cell table:style-name="Table1.A1" office:value-type="string">
            <text:p text:style-name="Table_20_Contents">Targeted Attack</text:p>
          </table:table-cell>
          <table:table-cell table:style-name="Table1.A1" office:value-type="string">
            <text:p text:style-name="Table_20_Contents">targetedAttackLikelihood</text:p>
          </table:table-cell>
          <table:table-cell table:style-name="Table1.A1" office:value-type="string">
            <text:p text:style-name="Table_20_Contents">-0.10 to +0.15</text:p>
          </table:table-cell>
        </table:table-row>
        <table:table-row>
          <table:table-cell table:style-name="Table1.A1" office:value-type="string">
            <text:p text:style-name="Table_20_Contents">Supply Chain</text:p>
          </table:table-cell>
          <table:table-cell table:style-name="Table1.A1" office:value-type="string">
            <text:p text:style-name="Table_20_Contents">supplyChainPosition</text:p>
          </table:table-cell>
          <table:table-cell table:style-name="Table1.A1" office:value-type="string">
            <text:p text:style-name="Table_20_Contents">-0.05 to +0.15</text:p>
          </table:table-cell>
        </table:table-row>
        <table:table-row>
          <table:table-cell table:style-name="Table1.A1" office:value-type="string">
            <text:p text:style-name="Table_20_Contents">Remote Workforce</text:p>
          </table:table-cell>
          <table:table-cell table:style-name="Table1.A1" office:value-type="string">
            <text:p text:style-name="Table_20_Contents">remoteWorkforce</text:p>
          </table:table-cell>
          <table:table-cell table:style-name="Table1.A1" office:value-type="string">
            <text:p text:style-name="Table_20_Contents">-0.10 to +0.15</text:p>
          </table:table-cell>
        </table:table-row>
        <table:table-row>
          <table:table-cell table:style-name="Table1.A1" office:value-type="string">
            <text:p text:style-name="Table_20_Contents">Previous Breach</text:p>
          </table:table-cell>
          <table:table-cell table:style-name="Table1.A1" office:value-type="string">
            <text:p text:style-name="Table_20_Contents">previousBreachHistory</text:p>
          </table:table-cell>
          <table:table-cell table:style-name="Table1.A1" office:value-type="string">
            <text:p text:style-name="Table_20_Contents">0.00 to +0.55</text:p>
          </table:table-cell>
        </table:table-row>
      </table:table>
      <text:p text:style-name="P59"/>
      <text:p text:style-name="P59">Annual Loss Expectancy (ALE)</text:p>
      <text:p text:style-name="P59"/>
      <text:p text:style-name="P60">ALE = P(breach) × CoNC_total (sum of 9 cost categories)</text:p>
      <text:p text:style-name="P58">Organization Parameters → CONC Usage Map</text:p>
      <text:p text:style-name="P60"/>
      <text:p text:style-name="P60">The Organization model has 44 fields. Here's where each feeds into CONC calculations.</text:p>
      <text:p text:style-name="P60"/>
      <text:p text:style-name="P59">Fields Used in CONC Cost Calculator (13 fields)</text:p>
      <text:p text:style-name="P60"/>
      <table:table table:name="Table2" table:style-name="Table2">
        <table:table-column table:style-name="Table2.A" table:number-columns-repeated="3"/>
        <table:table-row>
          <table:table-cell table:style-name="Table2.A1" office:value-type="string">
            <text:p text:style-name="P61">Field</text:p>
          </table:table-cell>
          <table:table-cell table:style-name="Table2.A1" office:value-type="string">
            <text:p text:style-name="P61">Type</text:p>
          </table:table-cell>
          <table:table-cell table:style-name="Table2.A1" office:value-type="string">
            <text:p text:style-name="P61">CONC Usage</text:p>
          </table:table-cell>
        </table:table-row>
        <table:table-row>
          <table:table-cell table:style-name="Table2.A1" office:value-type="string">
            <text:p text:style-name="Table_20_Contents">naceSection</text:p>
          </table:table-cell>
          <table:table-cell table:style-name="Table2.A1" office:value-type="string">
            <text:p text:style-name="Table_20_Contents">NaceSection enum (A-S)</text:p>
          </table:table-cell>
          <table:table-cell table:style-name="Table2.A1" office:value-type="string">
            <text:p text:style-name="Table_20_Contents">→ IBM sector factor (0.9–1.1) → Downtime, IR, Restore, EBI, CCL, Regulatory, Reputation, Governance</text:p>
          </table:table-cell>
        </table:table-row>
        <table:table-row>
          <table:table-cell table:style-name="Table2.A1" office:value-type="string">
            <text:p text:style-name="Table_20_Contents">revenueRange</text:p>
          </table:table-cell>
          <table:table-cell table:style-name="Table2.A1" office:value-type="string">
            <text:p text:style-name="Table_20_Contents">Int (EUR)</text:p>
          </table:table-cell>
          <table:table-cell table:style-name="Table2.A1" office:value-type="string">
            <text:p text:style-name="Table_20_Contents">→ Daily revenue, all anchor interpolations, CCL/Reputation base %, fine ceiling</text:p>
          </table:table-cell>
        </table:table-row>
        <table:table-row>
          <table:table-cell table:style-name="Table2.A1" office:value-type="string">
            <text:p text:style-name="Table_20_Contents">businessDaysPerYear</text:p>
          </table:table-cell>
          <table:table-cell table:style-name="Table2.A1" office:value-type="string">
            <text:p text:style-name="Table_20_Contents">Int</text:p>
          </table:table-cell>
          <table:table-cell table:style-name="Table2.A1" office:value-type="string">
            <text:p text:style-name="Table_20_Contents">→ Daily revenue = annual / this</text:p>
          </table:table-cell>
        </table:table-row>
        <table:table-row>
          <table:table-cell table:style-name="Table2.A1" office:value-type="string">
            <text:p text:style-name="Table_20_Contents">manualOperation</text:p>
          </table:table-cell>
          <table:table-cell table:style-name="Table2.A1" office:value-type="string">
            <text:p text:style-name="Table_20_Contents">ManualOperation (YES/PARTIAL/NO)</text:p>
          </table:table-cell>
          <table:table-cell table:style-name="Table2.A1" office:value-type="string">
            <text:p text:style-name="Table_20_Contents">→ IT dependency score (0/1/2)</text:p>
          </table:table-cell>
        </table:table-row>
        <table:table-row>
          <table:table-cell table:style-name="Table2.A1" office:value-type="string">
            <text:p text:style-name="Table_20_Contents">productionDependency</text:p>
          </table:table-cell>
          <table:table-cell table:style-name="Table2.A1" office:value-type="string">
            <text:p text:style-name="Table_20_Contents">ProductionDependency (NO_DEPENDENCY/PARTIAL/DIRECT)</text:p>
          </table:table-cell>
          <table:table-cell table:style-name="Table2.A1" office:value-type="string">
            <text:p text:style-name="Table_20_Contents">→ IT dependency score (0/1/2)</text:p>
          </table:table-cell>
        </table:table-row>
        <table:table-row>
          <table:table-cell table:style-name="Table2.A1" office:value-type="string">
            <text:p text:style-name="Table_20_Contents">customerAccess</text:p>
          </table:table-cell>
          <table:table-cell table:style-name="Table2.A1" office:value-type="string">
            <text:p text:style-name="Table_20_Contents">CustomerAccess (NOT_REQUIRED/PARTIAL/ESSENTIAL)</text:p>
          </table:table-cell>
          <table:table-cell table:style-name="Table2.A1" office:value-type="string">
            <text:p text:style-name="Table_20_Contents">→ IT dependency score (0/1/2)</text:p>
          </table:table-cell>
        </table:table-row>
        <table:table-row>
          <table:table-cell table:style-name="Table2.A1" office:value-type="string">
            <text:p text:style-name="Table_20_Contents">size</text:p>
          </table:table-cell>
          <table:table-cell table:style-name="Table2.A1" office:value-type="string">
            <text:p text:style-name="Table_20_Contents">OrgSize (MICRO–ENTERPRISE)</text:p>
          </table:table-cell>
          <table:table-cell table:style-name="Table2.A1" office:value-type="string">
            <text:p text:style-name="Table_20_Contents">→ Org size multiplier (0.90–1.15) on Downtime &amp; Notification</text:p>
          </table:table-cell>
        </table:table-row>
        <table:table-row>
          <table:table-cell table:style-name="Table2.A1" office:value-type="string">
            <text:p text:style-name="Table_20_Contents">infrastructureTypes</text:p>
          </table:table-cell>
          <table:table-cell table:style-name="Table2.A1" office:value-type="string">
            <text:p text:style-name="Table_20_Contents">InfrastructureType[]</text:p>
          </table:table-cell>
          <table:table-cell table:style-name="Table2.A1" office:value-type="string">
            <text:p text:style-name="Table_20_Contents">→ Restore cost multiplier (0.75–1.35, bottleneck principle)</text:p>
          </table:table-cell>
        </table:table-row>
        <table:table-row>
          <table:table-cell table:style-name="Table2.A1" office:value-type="string">
            <text:p text:style-name="Table_20_Contents">dataSensitivity</text:p>
          </table:table-cell>
          <table:table-cell table:style-name="Table2.A1" office:value-type="string">
            <text:p text:style-name="Table_20_Contents">DataSensitivity[]</text:p>
          </table:table-cell>
          <table:table-cell table:style-name="Table2.A1" office:value-type="string">
            <text:p text:style-name="Table_20_Contents">→ Reputation multiplier (0.80–1.50), Notification multiplier (0.50–1.60)</text:p>
          </table:table-cell>
        </table:table-row>
        <table:table-row>
          <table:table-cell table:style-name="Table2.A1" office:value-type="string">
            <text:p text:style-name="Table_20_Contents">regulatoryObligations</text:p>
          </table:table-cell>
          <table:table-cell table:style-name="Table2.A1" office:value-type="string">
            <text:p text:style-name="Table_20_Contents">RegulatoryObligation[]</text:p>
          </table:table-cell>
          <table:table-cell table:style-name="Table2.A1" office:value-type="string">
            <text:p text:style-name="Table_20_Contents">→ Framework count multiplier on Regulatory &amp; Notification</text:p>
          </table:table-cell>
        </table:table-row>
        <table:table-row>
          <table:table-cell table:style-name="Table2.A1" office:value-type="string">
            <text:p text:style-name="Table_20_Contents">geographicScope</text:p>
          </table:table-cell>
          <table:table-cell table:style-name="Table2.A1" office:value-type="string">
            <text:p text:style-name="Table_20_Contents">GeographicScope</text:p>
          </table:table-cell>
          <table:table-cell table:style-name="Table2.A1" office:value-type="string">
            <text:p text:style-name="Table_20_Contents">→ Geographic multiplier (1.0–1.35) on Regulatory &amp; Notification</text:p>
          </table:table-cell>
        </table:table-row>
        <table:table-row>
          <table:table-cell table:style-name="Table2.A1" office:value-type="string">
            <text:p text:style-name="Table_20_Contents">businessOrientation</text:p>
          </table:table-cell>
          <table:table-cell table:style-name="Table2.A1" office:value-type="string">
            <text:p text:style-name="Table_20_Contents">BusinessOrientation</text:p>
          </table:table-cell>
          <table:table-cell table:style-name="Table2.A1" office:value-type="string">
            <text:p text:style-name="Table_20_Contents">→ B2B/B2C model for CCL base % and Reputation base %</text:p>
          </table:table-cell>
        </table:table-row>
        <table:table-row>
          <table:table-cell table:style-name="Table2.A1" office:value-type="string">
            <text:p text:style-name="Table_20_Contents">revenueConcentration</text:p>
          </table:table-cell>
          <table:table-cell table:style-name="Table2.A1" office:value-type="string">
            <text:p text:style-name="Table_20_Contents">RevenueConcentration</text:p>
          </table:table-cell>
          <table:table-cell table:style-name="Table2.A1" office:value-type="string">
            <text:p text:style-name="Table_20_Contents">→ CCL base % tier (LOW/MEDIUM/HIGH)</text:p>
          </table:table-cell>
        </table:table-row>
        <table:table-row>
          <table:table-cell table:style-name="Table2.A1" office:value-type="string">
            <text:p text:style-name="Table_20_Contents">entityType</text:p>
          </table:table-cell>
          <table:table-cell table:style-name="Table2.A1" office:value-type="string">
            <text:p text:style-name="Table_20_Contents">EntityType (IMPORTANT/ESSENTIAL)</text:p>
          </table:table-cell>
          <table:table-cell table:style-name="Table2.A1" office:value-type="string">
            <text:p text:style-name="Table_20_Contents">→ Fine ceiling (1.4%/€7M vs 2.0%/€10M)</text:p>
          </table:table-cell>
        </table:table-row>
        <table:table-row>
          <table:table-cell table:style-name="Table2.A1" office:value-type="string">
            <text:p text:style-name="Table_20_Contents">previousBreachHistory</text:p>
          </table:table-cell>
          <table:table-cell table:style-name="Table2.A1" office:value-type="string">
            <text:p text:style-name="Table_20_Contents">PreviousBreachHistory</text:p>
          </table:table-cell>
          <table:table-cell table:style-name="Table2.A1" office:value-type="string">
            <text:p text:style-name="Table_20_Contents">→ Regulatory (1.0–1.5×), Reputation (1.0–1.4×)</text:p>
          </table:table-cell>
        </table:table-row>
      </table:table>
      <text:p text:style-name="P62"/>
      <text:p text:style-name="P62"/>
      <text:p text:style-name="P63">Fields Used in Breach Likelihood Calculator (12 fields)</text:p>
      <text:p text:style-name="P62"/>
      <table:table table:name="Table3" table:style-name="Table3">
        <table:table-column table:style-name="Table3.A" table:number-columns-repeated="3"/>
        <table:table-row>
          <table:table-cell table:style-name="Table3.A1" office:value-type="string">
            <text:p text:style-name="P64">Field</text:p>
          </table:table-cell>
          <table:table-cell table:style-name="Table3.A1" office:value-type="string">
            <text:p text:style-name="P64">Type</text:p>
          </table:table-cell>
          <table:table-cell table:style-name="Table3.A1" office:value-type="string">
            <text:p text:style-name="Table_20_Contents">Breach Likelihood Usage</text:p>
          </table:table-cell>
        </table:table-row>
        <table:table-row>
          <table:table-cell table:style-name="Table3.A1" office:value-type="string">
            <text:p text:style-name="Table_20_Contents">size</text:p>
          </table:table-cell>
          <table:table-cell table:style-name="Table3.A1" office:value-type="string">
            <text:p text:style-name="Table_20_Contents">OrgSize</text:p>
          </table:table-cell>
          <table:table-cell table:style-name="Table3.A1" office:value-type="string">
            <text:p text:style-name="Table_20_Contents">→ Base rate (6%–33%)</text:p>
          </table:table-cell>
        </table:table-row>
        <table:table-row>
          <table:table-cell table:style-name="Table3.A1" office:value-type="string">
            <text:p text:style-name="Table_20_Contents">naceSection</text:p>
          </table:table-cell>
          <table:table-cell table:style-name="Table3.A1" office:value-type="string">
            <text:p text:style-name="Table_20_Contents">NaceSection</text:p>
          </table:table-cell>
          <table:table-cell table:style-name="Table3.A1" office:value-type="string">
            <text:p text:style-name="Table_20_Contents">→ Industry beta (-0.10 to +0.40)</text:p>
          </table:table-cell>
        </table:table-row>
        <table:table-row>
          <table:table-cell table:style-name="Table3.A1" office:value-type="string">
            <text:p text:style-name="Table_20_Contents">dataSensitivity</text:p>
          </table:table-cell>
          <table:table-cell table:style-name="Table3.A1" office:value-type="string">
            <text:p text:style-name="Table_20_Contents">DataSensitivity[]</text:p>
          </table:table-cell>
          <table:table-cell table:style-name="Table3.A1" office:value-type="string">
            <text:p text:style-name="Table_20_Contents">→ Data attractiveness beta (-0.15 to +0.25, max wins)</text:p>
          </table:table-cell>
        </table:table-row>
        <table:table-row>
          <table:table-cell table:style-name="Table3.A1" office:value-type="string">
            <text:p text:style-name="Table_20_Contents">infrastructureTypes</text:p>
          </table:table-cell>
          <table:table-cell table:style-name="Table3.A1" office:value-type="string">
            <text:p text:style-name="Table_20_Contents">InfrastructureType[]</text:p>
          </table:table-cell>
          <table:table-cell table:style-name="Table3.A1" office:value-type="string">
            <text:p text:style-name="Table_20_Contents">→ Infra exposure beta (-0.10 to +0.20, max wins)</text:p>
          </table:table-cell>
        </table:table-row>
        <table:table-row>
          <table:table-cell table:style-name="Table3.A1" office:value-type="string">
            <text:p text:style-name="Table_20_Contents">geographicScope</text:p>
          </table:table-cell>
          <table:table-cell table:style-name="Table3.A1" office:value-type="string">
            <text:p text:style-name="Table_20_Contents">GeographicScope</text:p>
          </table:table-cell>
          <table:table-cell table:style-name="Table3.A1" office:value-type="string">
            <text:p text:style-name="Table_20_Contents">→ Geographic beta (-0.10 to +0.10)</text:p>
          </table:table-cell>
        </table:table-row>
        <table:table-row>
          <table:table-cell table:style-name="Table3.A1" office:value-type="string">
            <text:p text:style-name="Table_20_Contents">itSecurityStaff</text:p>
          </table:table-cell>
          <table:table-cell table:style-name="Table3.A1" office:value-type="string">
            <text:p text:style-name="Table_20_Contents">ItSecurityStaff</text:p>
          </table:table-cell>
          <table:table-cell table:style-name="Table3.A1" office:value-type="string">
            <text:p text:style-name="Table_20_Contents">→ Security staffing beta (-0.15 to +0.20)</text:p>
          </table:table-cell>
        </table:table-row>
        <table:table-row>
          <table:table-cell table:style-name="Table3.A1" office:value-type="string">
            <text:p text:style-name="Table_20_Contents">securityMaturity</text:p>
          </table:table-cell>
          <table:table-cell table:style-name="Table3.A1" office:value-type="string">
            <text:p text:style-name="Table_20_Contents">SecurityMaturity</text:p>
          </table:table-cell>
          <table:table-cell table:style-name="Table3.A1" office:value-type="string">
            <text:p text:style-name="Table_20_Contents">→ Security maturity beta (-0.20 to +0.25)</text:p>
          </table:table-cell>
        </table:table-row>
        <table:table-row>
          <table:table-cell table:style-name="Table3.A1" office:value-type="string">
            <text:p text:style-name="Table_20_Contents">publicFacingServices</text:p>
          </table:table-cell>
          <table:table-cell table:style-name="Table3.A1" office:value-type="string">
            <text:p text:style-name="Table_20_Contents">PublicFacingServices</text:p>
          </table:table-cell>
          <table:table-cell table:style-name="Table3.A1" office:value-type="string">
            <text:p text:style-name="Table_20_Contents">→ Public services beta (-0.10 to +0.20)</text:p>
          </table:table-cell>
        </table:table-row>
        <table:table-row>
          <table:table-cell table:style-name="Table3.A1" office:value-type="string">
            <text:p text:style-name="Table_20_Contents">targetedAttackLikelihood</text:p>
          </table:table-cell>
          <table:table-cell table:style-name="Table3.A1" office:value-type="string">
            <text:p text:style-name="Table_20_Contents">TargetedAttackLikelihood</text:p>
          </table:table-cell>
          <table:table-cell table:style-name="Table3.A1" office:value-type="string">
            <text:p text:style-name="Table_20_Contents">→ Targeted attack beta (-0.10 to +0.15)</text:p>
          </table:table-cell>
        </table:table-row>
        <table:table-row>
          <table:table-cell table:style-name="Table3.A1" office:value-type="string">
            <text:p text:style-name="Table_20_Contents">supplyChainPosition</text:p>
          </table:table-cell>
          <table:table-cell table:style-name="Table3.A1" office:value-type="string">
            <text:p text:style-name="Table_20_Contents">SupplyChainPosition</text:p>
          </table:table-cell>
          <table:table-cell table:style-name="Table3.A1" office:value-type="string">
            <text:p text:style-name="Table_20_Contents">→ Supply chain beta (-0.05 to +0.15)</text:p>
          </table:table-cell>
        </table:table-row>
        <table:table-row>
          <table:table-cell table:style-name="Table3.A1" office:value-type="string">
            <text:p text:style-name="Table_20_Contents">remoteWorkforce</text:p>
          </table:table-cell>
          <table:table-cell table:style-name="Table3.A1" office:value-type="string">
            <text:p text:style-name="Table_20_Contents">RemoteWorkforce</text:p>
          </table:table-cell>
          <table:table-cell table:style-name="Table3.A1" office:value-type="string">
            <text:p text:style-name="Table_20_Contents">→ Remote workforce beta (-0.10 to +0.15)</text:p>
          </table:table-cell>
        </table:table-row>
        <table:table-row>
          <table:table-cell table:style-name="Table3.A1" office:value-type="string">
            <text:p text:style-name="Table_20_Contents">previousBreachHistory</text:p>
          </table:table-cell>
          <table:table-cell table:style-name="Table3.A1" office:value-type="string">
            <text:p text:style-name="Table_20_Contents">PreviousBreachHistory</text:p>
          </table:table-cell>
          <table:table-cell table:style-name="Table3.A1" office:value-type="string">
            <text:p text:style-name="Table_20_Contents">→ Previous breach beta (0 to +0.55)</text:p>
          </table:table-cell>
        </table:table-row>
      </table:table>
      <text:p text:style-name="P62"/>
      <text:p text:style-name="P62">Fields Used in Both Calculators (5 fields)</text:p>
      <text:p text:style-name="P62"/>
      <text:p text:style-name="P62">size, naceSection, dataSensitivity, infrastructureTypes, geographicScope, previousBreachHistory — these 6 fields appear in both engines.</text:p>
      <text:p text:style-name="P63">Fields NOT Used in CONC</text:p>
      <text:p text:style-name="P6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5">Field</text:p>
          </table:table-cell>
          <table:table-cell table:style-name="Table4.A1" office:value-type="string">
            <text:p text:style-name="P65">Category</text:p>
          </table:table-cell>
          <table:table-cell table:style-name="Table4.A1" office:value-type="string">
            <text:p text:style-name="P65">Notes</text:p>
          </table:table-cell>
          <table:table-cell table:style-name="Table4.A1" office:value-type="string">
            <text:p text:style-name="P66">IG</text:p>
          </table:table-cell>
        </table:table-row>
        <table:table-row>
          <table:table-cell table:style-name="Table4.A1" office:value-type="string">
            <text:p text:style-name="Table_20_Contents">legalForm</text:p>
          </table:table-cell>
          <table:table-cell table:style-name="Table4.A1" office:value-type="string">
            <text:p text:style-name="Table_20_Contents">Classification</text:p>
          </table:table-cell>
          <table:table-cell table:style-name="Table4.A1" office:value-type="string">
            <text:p text:style-name="Table_20_Contents">Not in any CONC formula</text:p>
          </table:table-cell>
          <table:table-cell table:style-name="Table4.A1" office:value-type="string">
            <text:p text:style-name="Table_20_Contents"/>
          </table:table-cell>
        </table:table-row>
        <table:table-row>
          <table:table-cell table:style-name="Table4.A1" office:value-type="string">
            <text:p text:style-name="Table_20_Contents">maturity</text:p>
          </table:table-cell>
          <table:table-cell table:style-name="Table4.A1" office:value-type="string">
            <text:p text:style-name="Table_20_Contents">Classification</text:p>
          </table:table-cell>
          <table:table-cell table:style-name="Table4.A1" office:value-type="string">
            <text:p text:style-name="Table_20_Contents">Org lifecycle — not used</text:p>
          </table:table-cell>
          <table:table-cell table:style-name="Table4.A1" office:value-type="string">
            <text:p text:style-name="Table_20_Contents"/>
          </table:table-cell>
        </table:table-row>
        <table:table-row>
          <table:table-cell table:style-name="Table4.A1" office:value-type="string">
            <text:p text:style-name="Table_20_Contents">ownershipType</text:p>
          </table:table-cell>
          <table:table-cell table:style-name="Table4.A1" office:value-type="string">
            <text:p text:style-name="Table_20_Contents">Classification</text:p>
          </table:table-cell>
          <table:table-cell table:style-name="Table4.A1" office:value-type="string">
            <text:p text:style-name="Table_20_Contents">Not in any CONC formula</text:p>
          </table:table-cell>
          <table:table-cell table:style-name="Table4.A1" office:value-type="string">
            <text:p text:style-name="Table_20_Contents"/>
          </table:table-cell>
        </table:table-row>
        <table:table-row>
          <table:table-cell table:style-name="Table4.A1" office:value-type="string">
            <text:p text:style-name="Table_20_Contents">digitalMaturity</text:p>
          </table:table-cell>
          <table:table-cell table:style-name="Table4.A1" office:value-type="string">
            <text:p text:style-name="Table_20_Contents">Classification</text:p>
          </table:table-cell>
          <table:table-cell table:style-name="Table4.A1" office:value-type="string">
            <text:p text:style-name="P67">Not in any CONC formula</text:p>
          </table:table-cell>
          <table:table-cell table:style-name="Table4.A1" office:value-type="string">
            <text:p text:style-name="P67"/>
          </table:table-cell>
        </table:table-row>
        <table:table-row>
          <table:table-cell table:style-name="Table4.A1" office:value-type="string">
            <text:p text:style-name="Table_20_Contents">esgStatus</text:p>
          </table:table-cell>
          <table:table-cell table:style-name="Table4.A1" office:value-type="string">
            <text:p text:style-name="Table_20_Contents">Classification</text:p>
          </table:table-cell>
          <table:table-cell table:style-name="Table4.A1" office:value-type="string">
            <text:p text:style-name="P67">Not in any CONC formula</text:p>
          </table:table-cell>
          <table:table-cell table:style-name="Table4.A1" office:value-type="string">
            <text:p text:style-name="P67"/>
          </table:table-cell>
        </table:table-row>
        <table:table-row>
          <table:table-cell table:style-name="Table4.A1" office:value-type="string">
            <text:p text:style-name="Table_20_Contents">supplyChainRole</text:p>
          </table:table-cell>
          <table:table-cell table:style-name="Table4.A1" office:value-type="string">
            <text:p text:style-name="Table_20_Contents">Classification</text:p>
          </table:table-cell>
          <table:table-cell table:style-name="Table4.A1" office:value-type="string">
            <text:p text:style-name="Table_20_Contents">Not used (distinct from supplyChainPosition)</text:p>
          </table:table-cell>
          <table:table-cell table:style-name="Table4.A1" office:value-type="string">
            <text:p text:style-name="Table_20_Contents">15.1; 15.2; 15.3; 15.4; 15.5</text:p>
          </table:table-cell>
        </table:table-row>
        <table:table-row>
          <table:table-cell table:style-name="Table4.A1" office:value-type="string">
            <text:p text:style-name="Table_20_Contents">riskProfile</text:p>
          </table:table-cell>
          <table:table-cell table:style-name="Table4.A1" office:value-type="string">
            <text:p text:style-name="Table_20_Contents">Classification</text:p>
          </table:table-cell>
          <table:table-cell table:style-name="Table4.A1" office:value-type="string">
            <text:p text:style-name="Table_20_Contents">Not in any CONC formula</text:p>
          </table:table-cell>
          <table:table-cell table:style-name="Table4.A1" office:value-type="string">
            <text:p text:style-name="Table_20_Contents"/>
          </table:table-cell>
        </table:table-row>
        <table:table-row>
          <table:table-cell table:style-name="Table4.A1" office:value-type="string">
            <text:p text:style-name="Table_20_Contents">euTaxonomyAligned</text:p>
          </table:table-cell>
          <table:table-cell table:style-name="Table4.A1" office:value-type="string">
            <text:p text:style-name="Table_20_Contents">Classification</text:p>
          </table:table-cell>
          <table:table-cell table:style-name="Table4.A1" office:value-type="string">
            <text:p text:style-name="Table_20_Contents">Not in any CONC formula</text:p>
          </table:table-cell>
          <table:table-cell table:style-name="Table4.A1" office:value-type="string">
            <text:p text:style-name="Table_20_Contents"/>
          </table:table-cell>
        </table:table-row>
        <table:table-row>
          <table:table-cell table:style-name="Table4.A1" office:value-type="string">
            <text:p text:style-name="Table_20_Contents">itEndpointRange</text:p>
          </table:table-cell>
          <table:table-cell table:style-name="Table4.A1" office:value-type="string">
            <text:p text:style-name="Table_20_Contents">IT &amp; Security</text:p>
          </table:table-cell>
          <table:table-cell table:style-name="Table4.A1" office:value-type="string">
            <text:p text:style-name="Table_20_Contents">Not in any CONC formula</text:p>
          </table:table-cell>
          <table:table-cell table:style-name="Table4.A1" office:value-type="string">
            <text:p text:style-name="Table_20_Contents">1,1; 1.3; 2.1; 2.4; 4.1; 5.1; 7.4; 7.5; 8.9; 10.1; 10.2; 10.3; 10.4; 10.5; 10.6; 10.7; 11.2; 13.1</text:p>
          </table:table-cell>
        </table:table-row>
        <table:table-row>
          <table:table-cell table:style-name="Table4.A1" office:value-type="string">
            <text:p text:style-name="Table_20_Contents">softwareDevelopment</text:p>
          </table:table-cell>
          <table:table-cell table:style-name="Table4.A1" office:value-type="string">
            <text:p text:style-name="Table_20_Contents">IT &amp; Security</text:p>
          </table:table-cell>
          <table:table-cell table:style-name="Table4.A1" office:value-type="string">
            <text:p text:style-name="Table_20_Contents">Not in any CONC formul<text:soft-page-break/>a</text:p>
          </table:table-cell>
          <table:table-cell table:style-name="Table4.A1" office:value-type="string">
            <text:p text:style-name="Table_20_Contents">2.6; 14.9; 16.1; 16.2; 16.3; 16.4; 16.5; 16.6; 16.7; 16.8; 16.9; 16.10</text:p>
          </table:table-cell>
        </table:table-row>
        <table:table-row>
          <table:table-cell table:style-name="Table4.A1" office:value-type="string">
            <text:p text:style-name="Table_20_Contents">downtimeTolerance</text:p>
          </table:table-cell>
          <table:table-cell table:style-name="Table4.A1" office:value-type="string">
            <text:p text:style-name="Table_20_Contents">IT &amp; Security</text:p>
          </table:table-cell>
          <table:table-cell table:style-name="Table4.A1" office:value-type="string">
            <text:p text:style-name="Table_20_Contents">Not in any CONC formula</text:p>
          </table:table-cell>
          <table:table-cell table:style-name="Table4.A1" office:value-type="string">
            <text:p text:style-name="Table_20_Contents">11.1; 11.2; 11.3; 11.4; 11.5; 17.4 (near-zero)</text:p>
          </table:table-cell>
        </table:table-row>
        <table:table-row>
          <table:table-cell table:style-name="Table4.A1" office:value-type="string">
            <text:p text:style-name="Table_20_Contents">securityBudgetRange</text:p>
          </table:table-cell>
          <table:table-cell table:style-name="Table4.A1" office:value-type="string">
            <text:p text:style-name="Table_20_Contents">IT &amp; Security</text:p>
          </table:table-cell>
          <table:table-cell table:style-name="Table4.A1" office:value-type="string">
            <text:p text:style-name="Table_20_Contents">Not in any CONC formula</text:p>
          </table:table-cell>
          <table:table-cell table:style-name="Table4.A1" office:value-type="string">
            <text:p text:style-name="Table_20_Contents">2.4; 18.1 (MINIMAL); 18.2 (MINIMAL); 18.3 (MINIMAL); 18.4 (MINIMAL); 18.5 (MINIMAL)</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adornments="Bold" style:font-pitch="variable"/>
    <style:font-face style:name="Ubuntu Sans" svg:font-family="'Ubuntu Sans'" style:font-family-generic="swiss"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 style:family="paragraph" style:parent-style-name="Standard">
      <style:text-properties fo:font-variant="normal" fo:text-transform="none" fo:color="#355269" loext:opacity="100%" fo:font-weight="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05:00.478397203</meta:creation-date>
    <dc:date>2026-03-17T12:15:07.218605914</dc:date>
    <meta:editing-duration>PT3H33M27S</meta:editing-duration>
    <meta:editing-cycles>41</meta:editing-cycles>
    <meta:generator>LibreOffice/25.8.5.2$Linux_X86_64 LibreOffice_project/252c20f6956e3db0b52e6e2f9dda67263513c8fc</meta:generator>
    <meta:document-statistic meta:table-count="4" meta:image-count="0" meta:object-count="0" meta:page-count="14" meta:paragraph-count="385" meta:word-count="2536" meta:character-count="17977" meta:non-whitespace-character-count="15288"/>
  </office:meta>
</office:document-meta>
</file>